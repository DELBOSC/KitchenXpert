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KitchenXpert</text:span>, c’est la plateforme en ligne qui simplifie et modernise entièrement la création et la gestion de projets de cuisine, pour tous les profils – particuliers, artisans cuisinistes ou grandes marques. Voici en termes clairs ce qu’elle propose et sur quoi elle repose :</text:p>
      <text:p text:style-name="Horizontal_20_Line"/>
      <text:h text:style-name="Heading_20_2" text:outline-level="2">1. Conception rapide et sur-mesure</text:h>
      <text:list xml:id="list8191997124627546729" text:style-name="L1">
        <text:list-item>
          <text:p text:style-name="P1"><text:span text:style-name="Strong_20_Emphasis">Scan 3D</text:span> : avec votre smartphone, vous capturez votre pièce en quelques secondes.</text:p>
        </text:list-item>
        <text:list-item>
          <text:p text:style-name="P1"><text:span text:style-name="Strong_20_Emphasis">IA intelligente</text:span> : en un clic, l’outil vous propose plusieurs agencements optimisés selon votre espace, votre budget et votre style.</text:p>
        </text:list-item>
        <text:list-item>
          <text:p text:style-name="P1"><text:span text:style-name="Strong_20_Emphasis">Personnalisation instantanée</text:span> : changez la couleur des façades, le type de poignée ou l’éclairage, et voyez tout de suite le résultat.</text:p>
        </text:list-item>
      </text:list>
      <text:p text:style-name="Text_20_body"><text:span text:style-name="Strong_20_Emphasis">Technologies clés</text:span> : algorithmes d’<text:span text:style-name="Strong_20_Emphasis">intelligence artificielle</text:span>, traitement d’images, rendu <text:span text:style-name="Strong_20_Emphasis">3D Web</text:span>.</text:p>
      <text:p text:style-name="Horizontal_20_Line"/>
      <text:h text:style-name="Heading_20_2" text:outline-level="2">2. Immersion AR/VR</text:h>
      <text:list xml:id="list497961257733736109" text:style-name="L2">
        <text:list-item>
          <text:p text:style-name="P2"><text:span text:style-name="Strong_20_Emphasis">Réalité augmentée</text:span> : projetez votre future cuisine directement dans votre salon pour tester chaque élément « en vrai ».</text:p>
        </text:list-item>
        <text:list-item>
          <text:p text:style-name="P2"><text:span text:style-name="Strong_20_Emphasis">Visite virtuelle</text:span> : enfilez un casque VR ou partagez un lien web pour visiter votre projet en immersion totale, seul ou avec un conseiller.</text:p>
        </text:list-item>
      </text:list>
      <text:p text:style-name="Text_20_body"><text:span text:style-name="Strong_20_Emphasis">Technologies clés</text:span> : <text:span text:style-name="Strong_20_Emphasis">ARKit</text:span>/Android LiDAR, <text:span text:style-name="Strong_20_Emphasis">WebXR</text:span>, moteur <text:span text:style-name="Strong_20_Emphasis">Three.js</text:span>.</text:p>
      <text:p text:style-name="Horizontal_20_Line"/>
      <text:h text:style-name="Heading_20_2" text:outline-level="2">3. Pilotage complet du projet</text:h>
      <text:list xml:id="list2416230531207876621" text:style-name="L3">
        <text:list-item>
          <text:p text:style-name="P3"><text:span text:style-name="Strong_20_Emphasis">Tableau de bord simple</text:span> : suivez vos étapes (devis, commandes, pose) et recevez des alertes à chaque jalon.</text:p>
        </text:list-item>
        <text:list-item>
          <text:p text:style-name="P3"><text:span text:style-name="Strong_20_Emphasis">Collaboration en ligne</text:span> : chat intégré et co-édition 3D en temps réel pour vous et votre cuisiniste.</text:p>
        </text:list-item>
        <text:list-item>
          <text:p text:style-name="P3"><text:span text:style-name="Strong_20_Emphasis">Rappels automatiques</text:span> : notifications par e-mail ou sur mobile si une validation ou un paiement est en retard.</text:p>
        </text:list-item>
      </text:list>
      <text:p text:style-name="Text_20_body"><text:span text:style-name="Strong_20_Emphasis">Technologies clés</text:span> : application <text:span text:style-name="Strong_20_Emphasis">cloud</text:span>, notifications <text:span text:style-name="Strong_20_Emphasis">push</text:span>, co-édition <text:span text:style-name="Strong_20_Emphasis">WebRTC</text:span>.</text:p>
      <text:p text:style-name="Horizontal_20_Line"/>
      <text:h text:style-name="Heading_20_2" text:outline-level="2">4. Devis, commandes et facturation automatisés</text:h>
      <text:list xml:id="list3194840005916782414" text:style-name="L4">
        <text:list-item>
          <text:p text:style-name="P4"><text:span text:style-name="Strong_20_Emphasis">Devis dynamique</text:span> : les prix se mettent à jour automatiquement selon les tarifs des fournisseurs et vos options.</text:p>
        </text:list-item>
        <text:list-item>
          <text:p text:style-name="P4"><text:span text:style-name="Strong_20_Emphasis">Factures sans papier</text:span> : signature électronique et envoi direct, avec possibilité de payer en plusieurs fois.</text:p>
        </text:list-item>
        <text:list-item>
          <text:p text:style-name="P4"><text:span text:style-name="Strong_20_Emphasis">Suivi des marges</text:span> : vous savez toujours ce que vous gagnez, sans calcul compliqué.</text:p>
        </text:list-item>
      </text:list>
      <text:p text:style-name="Text_20_body"><text:span text:style-name="Strong_20_Emphasis">Technologies clés</text:span> : intégrations <text:span text:style-name="Strong_20_Emphasis">API</text:span> fournisseurs, paiement <text:span text:style-name="Strong_20_Emphasis">Stripe/PayPal</text:span>, signature <text:span text:style-name="Strong_20_Emphasis">eIDAS</text:span>.</text:p>
      <text:p text:style-name="Horizontal_20_Line"><text:soft-page-break/></text:p>
      <text:h text:style-name="Heading_20_2" text:outline-level="2">5. Découpe CNC et liste de pièces</text:h>
      <text:list xml:id="list9033036962920215181" text:style-name="L5">
        <text:list-item>
          <text:p text:style-name="P5"><text:span text:style-name="Strong_20_Emphasis">Optimisation des matériaux</text:span> : l’outil calcule la meilleure découpe pour minimiser les chutes de plan de travail ou de meubles.</text:p>
        </text:list-item>
        <text:list-item>
          <text:p text:style-name="P5"><text:span text:style-name="Strong_20_Emphasis">Export machine</text:span> : vos plans partent directement sur les machines de découpe en atelier, avec tous les repères nécessaires.</text:p>
        </text:list-item>
      </text:list>
      <text:p text:style-name="Text_20_body"><text:span text:style-name="Strong_20_Emphasis">Technologies clés</text:span> : algorithme de <text:span text:style-name="Strong_20_Emphasis">nesting</text:span>, export <text:span text:style-name="Strong_20_Emphasis">JDF/JMF</text:span>, connexion aux ateliers CNC.</text:p>
      <text:p text:style-name="Horizontal_20_Line"/>
      <text:h text:style-name="Heading_20_2" text:outline-level="2">6. Suivi post-installation et IoT</text:h>
      <text:list xml:id="list6685442037200043886" text:style-name="L6">
        <text:list-item>
          <text:p text:style-name="P6"><text:span text:style-name="Strong_20_Emphasis">Jumeau numérique</text:span> : un modèle virtuel de votre cuisine relié à de vrais capteurs (énergie, température).</text:p>
        </text:list-item>
        <text:list-item>
          <text:p text:style-name="P6"><text:span text:style-name="Strong_20_Emphasis">Alertes prédictives</text:span> : la plateforme vous prévient en cas d’anomalie ou de besoin de maintenance avant même qu’un problème survienne.</text:p>
        </text:list-item>
      </text:list>
      <text:p text:style-name="Text_20_body"><text:span text:style-name="Strong_20_Emphasis">Technologies clés</text:span> : <text:span text:style-name="Strong_20_Emphasis">IoT</text:span>, capteurs <text:span text:style-name="Strong_20_Emphasis">MQTT</text:span>, analytics prédictif.</text:p>
      <text:p text:style-name="Horizontal_20_Line"/>
      <text:h text:style-name="Heading_20_2" text:outline-level="2">7. Analyse et durabilité</text:h>
      <text:list xml:id="list2676894282671073858" text:style-name="L7">
        <text:list-item>
          <text:p text:style-name="P7"><text:span text:style-name="Strong_20_Emphasis">Tableaux de bord clairs</text:span> : chiffres de vente, délais moyens, taux de satisfaction.</text:p>
        </text:list-item>
        <text:list-item>
          <text:p text:style-name="P7"><text:span text:style-name="Strong_20_Emphasis">Bilan carbone automatique</text:span> : calcul de l’empreinte écologique de votre projet et suggestions de matériaux plus respectueux de l’environnement.</text:p>
        </text:list-item>
      </text:list>
      <text:p text:style-name="Text_20_body"><text:span text:style-name="Strong_20_Emphasis">Technologies clés</text:span> : <text:span text:style-name="Strong_20_Emphasis">Data Lake</text:span>, visualisation <text:span text:style-name="Strong_20_Emphasis">BI</text:span>, calcul LCA.</text:p>
      <text:p text:style-name="Horizontal_20_Line"/>
      <text:h text:style-name="Heading_20_2" text:outline-level="2">8. Écosystème ouvert</text:h>
      <text:list xml:id="list6956204963663366140" text:style-name="L8">
        <text:list-item>
          <text:p text:style-name="P8"><text:span text:style-name="Strong_20_Emphasis">Bibliothèques de fabricants</text:span> : plus de 30 marques directement intégrées pour accéder immédiatement à leurs gammes.</text:p>
        </text:list-item>
        <text:list-item>
          <text:p text:style-name="P8"><text:span text:style-name="Strong_20_Emphasis">Plugins et extensions</text:span> : vous pouvez ajouter des modules (électroménager, accessoires, simulations) pour adapter KitchenXpert à vos besoins.</text:p>
        </text:list-item>
        <text:list-item>
          <text:p text:style-name="P8"><text:span text:style-name="Strong_20_Emphasis">Connecteurs externes</text:span> : l’outil se relie facilement à votre CRM, votre ERP ou à des services comme Zapier.</text:p>
        </text:list-item>
      </text:list>
      <text:p text:style-name="Text_20_body"><text:span text:style-name="Strong_20_Emphasis">Technologies clés</text:span> : <text:span text:style-name="Strong_20_Emphasis">API REST</text:span> / <text:span text:style-name="Strong_20_Emphasis">GraphQL</text:span>, SDK JavaScript, Webhooks.</text:p>
      <text:p text:style-name="Horizontal_20_Line"/>
      <text:h text:style-name="Heading_20_3" text:outline-level="3">Pourquoi tout le monde l’adopte</text:h>
      <text:list xml:id="list5296138799409349515" text:style-name="L9">
        <text:list-item>
          <text:p text:style-name="P9"><text:span text:style-name="Strong_20_Emphasis">Simplicité</text:span> : une interface claire, pas besoin de formation longue.</text:p>
        </text:list-item>
        <text:list-item>
          <text:p text:style-name="P9"><text:span text:style-name="Strong_20_Emphasis">Rapidité</text:span> : du scan initial à la commande en quelques clics.</text:p>
        </text:list-item>
        <text:list-item>
          <text:p text:style-name="P9"><text:soft-page-break/><text:span text:style-name="Strong_20_Emphasis">Précision</text:span> : aucun risque d’erreur technique ou financière.</text:p>
        </text:list-item>
        <text:list-item>
          <text:p text:style-name="P9"><text:span text:style-name="Strong_20_Emphasis">Immersion</text:span> : visualisez et validez chaque détail avant de commander.</text:p>
        </text:list-item>
        <text:list-item>
          <text:p text:style-name="P9"><text:span text:style-name="Strong_20_Emphasis">Écoresponsable</text:span> : suivez l’impact de vos choix et optimisez vos déchets.</text:p>
        </text:list-item>
      </text:list>
      <text:p text:style-name="Standard">De façon plus technique</text:p>
      <text:p text:style-name="Standard"/>
      <text:p text:style-name="Text_20_body">Voici une présentation exhaustive de <text:span text:style-name="Strong_20_Emphasis">KitchenXpert</text:span>, rédigée dans un style clair et technique, tout en restant accessible à un large public. Les mots-clés en <text:span text:style-name="Strong_20_Emphasis">gras</text:span> renvoient aux technologies et architectures sur lesquelles reposent chaque fonctionnalité.</text:p>
      <text:p text:style-name="Horizontal_20_Line"/>
      <text:h text:style-name="Heading_20_2" text:outline-level="2">1. Contexte &amp; objectifs</text:h>
      <text:p text:style-name="Text_20_body">KitchenXpert est une <text:span text:style-name="Strong_20_Emphasis">plateforme SaaS</text:span> 100 % dédiée à la conception, la gestion opérationnelle et l’analyse de projets de cuisines. Elle s’adresse aux <text:span text:style-name="Strong_20_Emphasis">particuliers</text:span>, <text:span text:style-name="Strong_20_Emphasis">cuisinistes / architectes d’intérieur</text:span> et <text:span text:style-name="Strong_20_Emphasis">fabricants / distributeurs</text:span>, en couvrant tout le cycle de vie : du scan 3D initial à la livraison, en passant par le devis, la découpe CNC, la facturation et le suivi IoT.</text:p>
      <text:p text:style-name="Horizontal_20_Line"/>
      <text:h text:style-name="Heading_20_2" text:outline-level="2">2. Architecture centrale</text:h>
      <text:list xml:id="list8395982398763068413" text:style-name="L10">
        <text:list-item>
          <text:p text:style-name="P10"><text:span text:style-name="Strong_20_Emphasis">Monorepo</text:span> orchestré par <text:span text:style-name="Strong_20_Emphasis">pnpm workspaces</text:span> et <text:span text:style-name="Strong_20_Emphasis">Lerna</text:span>, avec un <text:span text:style-name="Strong_20_Emphasis">tsconfig.json</text:span> racine pour gérer le <text:span text:style-name="Strong_20_Emphasis">TypeScript</text:span> inter-modules. Arborescence définitive…</text:p>
        </text:list-item>
        <text:list-item>
          <text:p text:style-name="P10"><text:span text:style-name="Strong_20_Emphasis">CI/CD GitOps</text:span> via <text:span text:style-name="Strong_20_Emphasis">GitHub Actions</text:span> et <text:span text:style-name="Strong_20_Emphasis">ArgoCD</text:span>, avec <text:span text:style-name="Strong_20_Emphasis">pipelines</text:span> de tests (frontend, backend, AI, data), builds Docker et déploiements en staging/production.</text:p>
        </text:list-item>
        <text:list-item>
          <text:p text:style-name="P10"><text:span text:style-name="Strong_20_Emphasis">Infra-as-Code</text:span> :</text:p>
          <text:list>
            <text:list-item>
              <text:p text:style-name="P10"><text:span text:style-name="Strong_20_Emphasis">Terraform</text:span> pour provisionner réseau, IAM, stockage</text:p>
            </text:list-item>
            <text:list-item>
              <text:p text:style-name="P10"><text:span text:style-name="Strong_20_Emphasis">Kubernetes</text:span> + <text:span text:style-name="Strong_20_Emphasis">Helm</text:span> pour déployer les services conteneurisés</text:p>
            </text:list-item>
            <text:list-item>
              <text:p text:style-name="P10"><text:span text:style-name="Strong_20_Emphasis">Chaos Engineering</text:span> (Gremlin / Litmus) pour valider la résilience.</text:p>
            </text:list-item>
          </text:list>
        </text:list-item>
      </text:list>
      <text:p text:style-name="Horizontal_20_Line"/>
      <text:h text:style-name="Heading_20_2" text:outline-level="2">3. Data &amp; Messaging</text:h>
      <text:list xml:id="list1382947340016632444" text:style-name="L11">
        <text:list-item>
          <text:p text:style-name="P11"><text:span text:style-name="Strong_20_Emphasis">Bases de données polyglottes</text:span> :</text:p>
          <text:list>
            <text:list-item>
              <text:p text:style-name="P11"><text:span text:style-name="Strong_20_Emphasis">PostgreSQL</text:span> (transactions, utilisateurs, projets)</text:p>
            </text:list-item>
            <text:list-item>
              <text:p text:style-name="P11"><text:span text:style-name="Strong_20_Emphasis">MongoDB</text:span> (catalogues produits, métadonnées dynamiques)</text:p>
            </text:list-item>
            <text:list-item>
              <text:p text:style-name="P11"><text:span text:style-name="Strong_20_Emphasis">InfluxDB</text:span> (séries temporelles IoT)</text:p>
            </text:list-item>
          </text:list>
        </text:list-item>
        <text:list-item>
          <text:p text:style-name="P11"><text:span text:style-name="Strong_20_Emphasis">Bus d’événements</text:span> : <text:span text:style-name="Strong_20_Emphasis">Apache Kafka</text:span> pour orchestrer asynchrone (agencements IA, commandes, alertes).</text:p>
        </text:list-item>
        <text:list-item>
          <text:p text:style-name="P11"><text:span text:style-name="Strong_20_Emphasis">Data Lake &amp; BI</text:span> :</text:p>
          <text:list>
            <text:list-item>
              <text:p text:style-name="P11">Ingestion ETL avec <text:span text:style-name="Strong_20_Emphasis">Apache Airflow</text:span> &amp; <text:span text:style-name="Strong_20_Emphasis">AWS Glue</text:span>, stockage sur <text:span text:style-name="Strong_20_Emphasis">S3</text:span></text:p>
            </text:list-item>
            <text:list-item>
              <text:p text:style-name="P11">Dashboards self-service sous <text:span text:style-name="Strong_20_Emphasis">Metabase</text:span> et <text:span text:style-name="Strong_20_Emphasis">Apache Superset</text:span></text:p>
            </text:list-item>
            <text:list-item>
              <text:p text:style-name="P11">Forecasting IA (Prophet, LSTM) pour tendances de style et volumes.</text:p>
            </text:list-item>
          </text:list>
        </text:list-item>
      </text:list>
      <text:p text:style-name="Horizontal_20_Line"><text:soft-page-break/></text:p>
      <text:h text:style-name="Heading_20_2" text:outline-level="2">4. Frontend et Design System</text:h>
      <text:list xml:id="list7330019235632947960" text:style-name="L12">
        <text:list-item>
          <text:p text:style-name="P12"><text:span text:style-name="Strong_20_Emphasis">Next.js</text:span> + <text:span text:style-name="Strong_20_Emphasis">React</text:span> + <text:span text:style-name="Strong_20_Emphasis">TypeScript</text:span> pour un rendu SSR / SPA</text:p>
        </text:list-item>
        <text:list-item>
          <text:p text:style-name="P12"><text:span text:style-name="Strong_20_Emphasis">Tailwind CSS</text:span> et <text:span text:style-name="Strong_20_Emphasis">shadcn/ui</text:span> pour un Design System modulaire (tokens, composants réutilisables)</text:p>
        </text:list-item>
        <text:list-item>
          <text:p text:style-name="P12"><text:span text:style-name="Strong_20_Emphasis">3D/VR/AR</text:span> intégrés :</text:p>
          <text:list>
            <text:list-item>
              <text:p text:style-name="P12"><text:span text:style-name="Strong_20_Emphasis">Three.js</text:span> et <text:span text:style-name="Strong_20_Emphasis">Unity WebGL</text:span> pour le moteur 3D propriétaire</text:p>
            </text:list-item>
            <text:list-item>
              <text:p text:style-name="P12"><text:span text:style-name="Strong_20_Emphasis">WebXR</text:span>, <text:span text:style-name="Strong_20_Emphasis">ARKit</text:span> (LiDAR) et <text:span text:style-name="Strong_20_Emphasis">HoloLens 2</text:span> pour immersion en réalité virtuelle/augmentée</text:p>
            </text:list-item>
            <text:list-item>
              <text:p text:style-name="P12"><text:span text:style-name="Strong_20_Emphasis">Photon Engine</text:span> pour la co-édition multi-utilisateurs en temps réel.</text:p>
            </text:list-item>
          </text:list>
        </text:list-item>
      </text:list>
      <text:p text:style-name="Horizontal_20_Line"/>
      <text:h text:style-name="Heading_20_2" text:outline-level="2">5. Backend &amp; API</text:h>
      <text:list xml:id="list2513961765207148819" text:style-name="L13">
        <text:list-item>
          <text:p text:style-name="P13"><text:span text:style-name="Strong_20_Emphasis">Node.js</text:span> + <text:span text:style-name="Strong_20_Emphasis">Express</text:span> (ou <text:span text:style-name="Strong_20_Emphasis">NestJS</text:span>) en micro-services conteneurisés</text:p>
        </text:list-item>
        <text:list-item>
          <text:p text:style-name="P13"><text:span text:style-name="Strong_20_Emphasis">GraphQL</text:span> unifié (API Gateway) + endpoints <text:span text:style-name="Strong_20_Emphasis">REST</text:span> pour les partenaires</text:p>
        </text:list-item>
        <text:list-item>
          <text:p text:style-name="P13"><text:span text:style-name="Strong_20_Emphasis">Authentification</text:span> : <text:span text:style-name="Strong_20_Emphasis">JWT</text:span>, <text:span text:style-name="Strong_20_Emphasis">OAuth2</text:span>, gestion des rôles/permissions</text:p>
        </text:list-item>
        <text:list-item>
          <text:p text:style-name="P13"><text:span text:style-name="Strong_20_Emphasis">Webhooks</text:span> et <text:span text:style-name="Strong_20_Emphasis">event-driven</text:span> pour mises à jour catalogues et notifications.</text:p>
        </text:list-item>
      </text:list>
      <text:p text:style-name="Horizontal_20_Line"/>
      <text:h text:style-name="Heading_20_2" text:outline-level="2">6. Modules IA conteneurisés</text:h>
      <text:list xml:id="list7742915000384020123" text:style-name="L14">
        <text:list-item>
          <text:p text:style-name="P14"><text:span text:style-name="Strong_20_Emphasis">Kitchen-Generator</text:span> (Python + <text:span text:style-name="Strong_20_Emphasis">TensorFlow</text:span> / <text:span text:style-name="Strong_20_Emphasis">PyTorch</text:span>) : layout génératif optimisé par <text:span text:style-name="Strong_20_Emphasis">GAN</text:span> et heuristiques.</text:p>
        </text:list-item>
        <text:list-item>
          <text:p text:style-name="P14"><text:span text:style-name="Strong_20_Emphasis">Compatibility-Engine</text:span> (TypeScript) : algorithmes techniques pour réseaux eau/élec/gaz et normes.</text:p>
        </text:list-item>
        <text:list-item>
          <text:p text:style-name="P14"><text:span text:style-name="Strong_20_Emphasis">Appliance-Advisor</text:span> : recommandation d’électroménager via scoring multi-critères.</text:p>
        </text:list-item>
        <text:list-item>
          <text:p text:style-name="P14"><text:span text:style-name="Strong_20_Emphasis">Style-Analyzer</text:span> : analyse des tendances et preferences esthétiques grâce à modèles ML (<text:span text:style-name="Strong_20_Emphasis">Hugging Face</text:span>).</text:p>
        </text:list-item>
        <text:list-item>
          <text:p text:style-name="P14"><text:span text:style-name="Strong_20_Emphasis">Supply-Chain Engine</text:span> : agent de négociation <text:span text:style-name="Strong_20_Emphasis">Reinforcement Learning</text:span> pour tarifs et volumes.</text:p>
        </text:list-item>
      </text:list>
      <text:p text:style-name="Horizontal_20_Line"/>
      <text:h text:style-name="Heading_20_2" text:outline-level="2">7. Moteur 3D &amp; découpe CNC</text:h>
      <text:list xml:id="list1250140633898452564" text:style-name="L15">
        <text:list-item>
          <text:p text:style-name="P15"><text:span text:style-name="Strong_20_Emphasis">Cut-list Generator</text:span> : algorithme génétique pour optimiser le <text:span text:style-name="Strong_20_Emphasis">nesting</text:span> et réduire les déchets, export <text:span text:style-name="Strong_20_Emphasis">JDF/JMF</text:span> vers machines <text:span text:style-name="Strong_20_Emphasis">Heidelberg</text:span> / <text:span text:style-name="Strong_20_Emphasis">Biesse</text:span>.</text:p>
        </text:list-item>
        <text:list-item>
          <text:p text:style-name="P15"><text:span text:style-name="Strong_20_Emphasis">Librairie paramétrique</text:span> pour BIM (export <text:span text:style-name="Strong_20_Emphasis">IFC</text:span>, intégration <text:span text:style-name="Strong_20_Emphasis">Revit / AutoCAD</text:span>).</text:p>
        </text:list-item>
      </text:list>
      <text:p text:style-name="Horizontal_20_Line"/>
      <text:h text:style-name="Heading_20_2" text:outline-level="2"><text:soft-page-break/>8. CRM &amp; Pilotage projet</text:h>
      <text:list xml:id="list954615162993576006" text:style-name="L16">
        <text:list-item>
          <text:p text:style-name="P16"><text:span text:style-name="Strong_20_Emphasis">Pipeline Kanban</text:span> intelligent avec <text:span text:style-name="Strong_20_Emphasis">Lead Scoring IA</text:span> (XGBoost)</text:p>
        </text:list-item>
        <text:list-item>
          <text:p text:style-name="P16"><text:span text:style-name="Strong_20_Emphasis">Workflow engine</text:span> (Camunda) pour automatiser étapes, validations et relances</text:p>
        </text:list-item>
        <text:list-item>
          <text:p text:style-name="P16">Chat &amp; visioconférence intégrés via <text:span text:style-name="Strong_20_Emphasis">WebRTC</text:span>, co-édition 3D synchronisée</text:p>
        </text:list-item>
        <text:list-item>
          <text:p text:style-name="P16">Intégration bidirectionnelle <text:span text:style-name="Strong_20_Emphasis">Outlook</text:span> / <text:span text:style-name="Strong_20_Emphasis">Google Calendar</text:span>, notifications push.</text:p>
        </text:list-item>
      </text:list>
      <text:p text:style-name="Horizontal_20_Line"/>
      <text:h text:style-name="Heading_20_2" text:outline-level="2">9. Devis, Facturation &amp; Finance</text:h>
      <text:list xml:id="list5938947062708242252" text:style-name="L17">
        <text:list-item>
          <text:p text:style-name="P17"><text:span text:style-name="Strong_20_Emphasis">Tarification dynamique</text:span> : agrégation temps réel d’APIs fournisseurs (prix, promos)</text:p>
        </text:list-item>
        <text:list-item>
          <text:p text:style-name="P17">Devis 100 % paramétriques avec <text:span text:style-name="Strong_20_Emphasis">React-PDF</text:span> et signature électronique (eIDAS)</text:p>
        </text:list-item>
        <text:list-item>
          <text:p text:style-name="P17">Paiements intégrés (<text:span text:style-name="Strong_20_Emphasis">Stripe</text:span>, <text:span text:style-name="Strong_20_Emphasis">PayPal</text:span>, <text:span text:style-name="Strong_20_Emphasis">Adyen</text:span>) et <text:span text:style-name="Strong_20_Emphasis">Smart Contracts</text:span> blockchain pour jalons automatiques</text:p>
        </text:list-item>
        <text:list-item>
          <text:p text:style-name="P17">Module <text:span text:style-name="Strong_20_Emphasis">Financement &amp; Leasing</text:span> (3×, 10× sans frais), plan d’amortissement et intégration CRM.</text:p>
        </text:list-item>
      </text:list>
      <text:p text:style-name="Horizontal_20_Line"/>
      <text:h text:style-name="Heading_20_2" text:outline-level="2">10. Jumeau numérique &amp; IoT</text:h>
      <text:list xml:id="list8727719479845688024" text:style-name="L18">
        <text:list-item>
          <text:p text:style-name="P18"><text:span text:style-name="Strong_20_Emphasis">Digital Twin</text:span> 3D enrichi de capteurs virtuels / réels (MQTT, OPC-UA)</text:p>
        </text:list-item>
        <text:list-item>
          <text:p text:style-name="P18">Surveillance prédictive via <text:span text:style-name="Strong_20_Emphasis">AWS SageMaker</text:span> et alertes en temps réel</text:p>
        </text:list-item>
        <text:list-item>
          <text:p text:style-name="P18">Analytics embarquée : consommation, performance et maintenance préventive.</text:p>
        </text:list-item>
      </text:list>
      <text:p text:style-name="Horizontal_20_Line"/>
      <text:h text:style-name="Heading_20_2" text:outline-level="2">11. Écosystème ouvert &amp; Marketplace</text:h>
      <text:list xml:id="list293165000368476521" text:style-name="L19">
        <text:list-item>
          <text:p text:style-name="P19"><text:span text:style-name="Strong_20_Emphasis">Developer Portal</text:span> : SDK JavaScript, OpenAPI / Swagger, sandbox</text:p>
        </text:list-item>
        <text:list-item>
          <text:p text:style-name="P19"><text:span text:style-name="Strong_20_Emphasis">Marketplace de plugins</text:span> certifiés (électroménager, accessoires, simulations)</text:p>
        </text:list-item>
        <text:list-item>
          <text:p text:style-name="P19">Connecteurs low-code <text:span text:style-name="Strong_20_Emphasis">Zapier</text:span>, <text:span text:style-name="Strong_20_Emphasis">Make.com</text:span>, <text:span text:style-name="Strong_20_Emphasis">IFTTT</text:span> pour workflows externes.</text:p>
        </text:list-item>
      </text:list>
      <text:p text:style-name="Horizontal_20_Line"/>
      <text:h text:style-name="Heading_20_2" text:outline-level="2">12. Applications Mobiles &amp; Voice</text:h>
      <text:list xml:id="list1803442311802685523" text:style-name="L20">
        <text:list-item>
          <text:p text:style-name="P20"><text:span text:style-name="Strong_20_Emphasis">PWA</text:span> offline-first (scan LiDAR sur iOS/Android)</text:p>
        </text:list-item>
        <text:list-item>
          <text:p text:style-name="P20">Apps natives <text:span text:style-name="Strong_20_Emphasis">React Native</text:span> / <text:span text:style-name="Strong_20_Emphasis">Flutter</text:span> pour interventions terrain</text:p>
        </text:list-item>
        <text:list-item>
          <text:p text:style-name="P20"><text:span text:style-name="Strong_20_Emphasis">Assistant vocal IA</text:span> « ChefXpert » basé sur NLU/TTS pour commandes et guidage.</text:p>
        </text:list-item>
      </text:list>
      <text:p text:style-name="Horizontal_20_Line"/>
      <text:h text:style-name="Heading_20_2" text:outline-level="2"><text:soft-page-break/>13. Sécurité, Conformité &amp; Observabilité</text:h>
      <text:list xml:id="list1711079106100655313" text:style-name="L21">
        <text:list-item>
          <text:p text:style-name="P21">Certifications <text:span text:style-name="Strong_20_Emphasis">ISO 27001</text:span>, <text:span text:style-name="Strong_20_Emphasis">SOC 2 Type II</text:span>, conformité <text:span text:style-name="Strong_20_Emphasis">RGPD / CCPA</text:span></text:p>
        </text:list-item>
        <text:list-item>
          <text:p text:style-name="P21">CSP, CORS, rate-limiting, chiffrement <text:span text:style-name="Strong_20_Emphasis">AES-256</text:span>, audits pentests &amp; bug bounty</text:p>
        </text:list-item>
        <text:list-item>
          <text:p text:style-name="P21"><text:span text:style-name="Strong_20_Emphasis">Monitoring</text:span> : <text:span text:style-name="Strong_20_Emphasis">Prometheus</text:span> / <text:span text:style-name="Strong_20_Emphasis">Grafana</text:span>, <text:span text:style-name="Strong_20_Emphasis">ELK</text:span>, tracing <text:span text:style-name="Strong_20_Emphasis">OpenTelemetry</text:span> / <text:span text:style-name="Strong_20_Emphasis">Jaeger</text:span></text:p>
        </text:list-item>
        <text:list-item>
          <text:p text:style-name="P21"><text:span text:style-name="Strong_20_Emphasis">Chaos Engineering</text:span> et self-healing pour garantir un <text:span text:style-name="Strong_20_Emphasis">uptime ≥ 99,9 %</text:span>.</text:p>
        </text:list-item>
      </text:list>
      <text:p text:style-name="Horizontal_20_Line"/>
      <text:h text:style-name="Heading_20_2" text:outline-level="2">14. Support, Formation &amp; Durabilité</text:h>
      <text:list xml:id="list5362009192924606656" text:style-name="L22">
        <text:list-item>
          <text:p text:style-name="P22">Portail d’assistance 24/7 avec <text:span text:style-name="Strong_20_Emphasis">chatbot IA</text:span>, base de connaissances et webinaires</text:p>
        </text:list-item>
        <text:list-item>
          <text:p text:style-name="P22">Programme de certification “KitchenXpert Expert”</text:p>
        </text:list-item>
        <text:list-item>
          <text:p text:style-name="P22"><text:span text:style-name="Strong_20_Emphasis">RSE &amp; durabilité</text:span> : LCA automatisée, calcul CO₂, alternatives bas-carbone, reporting <text:span text:style-name="Strong_20_Emphasis">CSRD</text:span>.</text:p>
        </text:list-item>
      </text:list>
      <text:p text:style-name="Horizontal_20_Line"/>
      <text:p text:style-name="Text_20_body">Avec cette infrastructure et ces modules, KitchenXpert constitue une <text:span text:style-name="Strong_20_Emphasis">Digital Kitchen Factory</text:span> complète, alliant <text:span text:style-name="Strong_20_Emphasis">micro-services</text:span>, <text:span text:style-name="Strong_20_Emphasis">IA générative</text:span>, <text:span text:style-name="Strong_20_Emphasis">XR</text:span>, <text:span text:style-name="Strong_20_Emphasis">blockchain</text:span>, <text:span text:style-name="Strong_20_Emphasis">IoT</text:span> et <text:span text:style-name="Strong_20_Emphasis">analytics</text:span>, pour transformer durablement la conception et la gestion de cuisines sur le marché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DELBOSC</meta:initial-creator>
    <meta:creation-date>2025-05-26T20:33:28.49</meta:creation-date>
    <meta:document-statistic meta:table-count="0" meta:image-count="0" meta:object-count="0" meta:page-count="6" meta:paragraph-count="117" meta:word-count="1388" meta:character-count="9065"/>
    <dc:date>2025-05-26T20:35:18.67</dc:date>
    <dc:creator>LAURENT DELBOSC</dc:creator>
    <meta:editing-duration>PT1M51S</meta:editing-duration>
    <meta:editing-cycles>1</meta:editing-cycles>
    <meta:generator>OpenOffice/4.1.15$Win32 OpenOffice.org_project/4115m2$Build-9813</meta:generator>
  </office:meta>
</office:document-meta>
</file>