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Code" svg:font-family="'Fira Code', 'Fira Mono', Menlo, Consolas, 'DejaVu Sa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499cm" fo:line-height="150%" fo:text-align="start" style:justify-single-word="false" fo:background-color="transparent">
        <style:background-image/>
      </style:paragraph-properties>
    </style:style>
    <style:style style:name="P5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transparent">
        <style:background-image/>
      </style:paragraph-properties>
      <style:text-properties fo:font-style="italic"/>
    </style:style>
    <style:style style:name="P6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</style:style>
    <style:style style:name="P7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  <style:text-properties fo:font-style="italic"/>
    </style:style>
    <style:style style:name="T1" style:family="text">
      <style:text-properties fo:color="#383a42" style:font-name="Fira Code" fo:background-color="transparent"/>
    </style:style>
    <style:style style:name="T2" style:family="text">
      <style:text-properties fo:color="#383a42" fo:background-color="transparent"/>
    </style:style>
    <style:style style:name="T3" style:family="text">
      <style:text-properties fo:color="#a0a1a7" style:font-name="Fira Code" fo:background-color="transparent"/>
    </style:style>
    <style:style style:name="T4" style:family="text">
      <style:text-properties fo:color="#a0a1a7" style:font-name="Fira Code" fo:font-style="italic" fo:background-color="transparent"/>
    </style:style>
    <style:style style:name="T5" style:family="text">
      <style:text-properties fo:color="#a626a4" style:font-name="Fira Code" fo:background-color="transparent"/>
    </style:style>
    <style:style style:name="T6" style:family="text">
      <style:text-properties fo:color="#b76b01" style:font-name="Fira Code" fo:background-color="transparent"/>
    </style:style>
    <style:style style:name="T7" style:family="text">
      <style:text-properties fo:color="#4078f2" style:font-name="Fira Code" fo:background-color="transparent"/>
    </style:style>
    <style:style style:name="T8" style:family="text">
      <style:text-properties fo:color="#50a14f" style:font-name="Fira Code" fo:background-color="transparent"/>
    </style:style>
    <style:style style:name="T9" style:family="text">
      <style:text-properties fo:color="#e45649" style:font-name="Fira Cod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ndards de Codage Pragmatiques - KitchenXpert</text:h>
      <text:p text:style-name="Text_20_body"><text:span text:style-name="Strong_20_Emphasis">Version 4.1.0 | Mai 2025</text:span></text:p>
      <text:h text:style-name="Heading_20_2" text:outline-level="2">? Philosophie : Puissance Simple, Maintenance Facile</text:h>
      <text:h text:style-name="Heading_20_3" text:outline-level="3">Principes Fondamentaux</text:h>
      <text:list xml:id="list2095199238005722908" text:style-name="L1">
        <text:list-item>
          <text:p text:style-name="P2"><text:span text:style-name="Strong_20_Emphasis">Modularité Intelligente</text:span> : Chaque module peut fonctionner indépendamment </text:p>
        </text:list-item>
        <text:list-item>
          <text:p text:style-name="P2"><text:span text:style-name="Strong_20_Emphasis">Fallbacks Automatiques</text:span> : Toujours une solution de secours fiable </text:p>
        </text:list-item>
        <text:list-item>
          <text:p text:style-name="P2"><text:span text:style-name="Strong_20_Emphasis">Self-Healing Code</text:span> : Détection et correction automatique des problèmes </text:p>
        </text:list-item>
        <text:list-item>
          <text:p text:style-name="P2"><text:span text:style-name="Strong_20_Emphasis">API-First Design</text:span> : Interopérabilité native pour partenaires B2B </text:p>
        </text:list-item>
        <text:list-item>
          <text:p text:style-name="P1"><text:span text:style-name="Strong_20_Emphasis">No-Code Layer</text:span> : Customisation sans programmation </text:p>
        </text:list-item>
      </text:list>
      <text:p text:style-name="Horizontal_20_Line"/>
      <text:h text:style-name="Heading_20_2" text:outline-level="2">?￯ﾸﾏ Architecture Simplifiée mais Puissante</text:h>
      <text:h text:style-name="Heading_20_3" text:outline-level="3">Core Engine - Le Cœur Simplifié</text:h>
      <text:p text:style-name="P3">typescript</text:p>
      <text:p text:style-name="P5"><text:span text:style-name="Source_20_Text"><text:span text:style-name="T3">// Architecture à 3 niveaux pour éviter la complexité</text:span></text:span></text:p>
      <text:p text:style-name="P6"><text:span text:style-name="Source_20_Text"><text:span text:style-name="T5">interface</text:span></text:span><text:span text:style-name="Source_20_Text"><text:span text:style-name="T1"> </text:span></text:span><text:span text:style-name="Source_20_Text"><text:span text:style-name="T6">KitchenXpertCore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4">// Niveau 1: Services de base (toujours disponibles)</text:span></text:span></text:p>
      <text:p text:style-name="P6"><text:span text:style-name="Source_20_Text"><text:span text:style-name="T2"><text:s text:c="2"/></text:span></text:span><text:span text:style-name="Source_20_Text"><text:span text:style-name="T1">basic</text:span></text:span><text:span text:style-name="Source_20_Text"><text:span text:style-name="T7">:</text:span></text:span><text:span text:style-name="Source_20_Text"><text:span text:style-name="T1"> BasicKitchenServices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Niveau 2: Services enrichis (avec fallbacks)</text:span></text:span></text:p>
      <text:p text:style-name="P6"><text:span text:style-name="Source_20_Text"><text:span text:style-name="T2"><text:s text:c="2"/></text:span></text:span><text:span text:style-name="Source_20_Text"><text:span text:style-name="T1">enhanced</text:span></text:span><text:span text:style-name="Source_20_Text"><text:span text:style-name="T7">:</text:span></text:span><text:span text:style-name="Source_20_Text"><text:span text:style-name="T1"> EnhancedKitchenServices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Niveau 3: Services avancés (optionnels)</text:span></text:span></text:p>
      <text:p text:style-name="P6"><text:span text:style-name="Source_20_Text"><text:span text:style-name="T2"><text:s text:c="2"/></text:span></text:span><text:span text:style-name="Source_20_Text"><text:span text:style-name="T1">advanced</text:span></text:span><text:span text:style-name="Source_20_Text"><text:span text:style-name="T7">?:</text:span></text:span><text:span text:style-name="Source_20_Text"><text:span text:style-name="T1"> AdvancedKitchenServices;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Service principal avec auto-healing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KitchenDesignEngine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readonly</text:span></text:span><text:span text:style-name="Source_20_Text"><text:span text:style-name="T1"> serviceRegistry</text:span></text:span><text:span text:style-name="Source_20_Text"><text:span text:style-name="T7">:</text:span></text:span><text:span text:style-name="Source_20_Text"><text:span text:style-name="T1"> ServiceRegistry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readonly</text:span></text:span><text:span text:style-name="Source_20_Text"><text:span text:style-name="T1"> healthMonitor</text:span></text:span><text:span text:style-name="Source_20_Text"><text:span text:style-name="T7">:</text:span></text:span><text:span text:style-name="Source_20_Text"><text:span text:style-name="T1"> HealthMonitor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readonly</text:span></text:span><text:span text:style-name="Source_20_Text"><text:span text:style-name="T1"> autoCorrector</text:span></text:span><text:span text:style-name="Source_20_Text"><text:span text:style-name="T7">:</text:span></text:span><text:span text:style-name="Source_20_Text"><text:span text:style-name="T1"> AutoCorrector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7">constructor</text:span></text:span><text:span text:style-name="Source_20_Text"><text:span text:style-name="T1">() {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setupAutoHealing</text:span></text:span><text:span text:style-name="Source_20_Text"><text:span text:style-name="T1">();</text:span></text:span></text:p>
      <text:p text:style-name="P6"><text:soft-page-break/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initializeWithFallbacks</text:span></text:span><text:span text:style-name="Source_20_Text"><text:span text:style-name="T1">(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Méthode principale simplifiée avec gestion d'erreurs intelligente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nerateDesign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1">requirements</text:span></text:span><text:span text:style-name="Source_20_Text"><text:span text:style-name="T7">:</text:span></text:span><text:span text:style-name="Source_20_Text"><text:span text:style-name="T1"> DesignRequirements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Design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startTime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7">performance</text:span></text:span><text:span text:style-name="Source_20_Text"><text:span text:style-name="T1">.</text:span></text:span><text:span text:style-name="Source_20_Text"><text:span text:style-name="T7">now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try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4">// Tentative avec le service le plus avancé disponible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result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tryAdvancedGeneration</text:span></text:span><text:span text:style-name="Source_20_Text"><text:span text:style-name="T1">(requirements);</text:span></text:span></text:p>
      <text:p text:style-name="P6"><text:span text:style-name="Source_20_Text"><text:span text:style-name="T2"><text:s text:c="6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enrichResult</text:span></text:span><text:span text:style-name="Source_20_Text"><text:span text:style-name="T1">(result, </text:span></text:span><text:span text:style-name="Source_20_Text"><text:span text:style-name="T8">'advanced'</text:span></text:span><text:span text:style-name="Source_20_Text"><text:span text:style-name="T1">);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4"/></text:span></text:span><text:span text:style-name="Source_20_Text"><text:span text:style-name="T1">} </text:span></text:span><text:span text:style-name="Source_20_Text"><text:span text:style-name="T5">catch</text:span></text:span><text:span text:style-name="Source_20_Text"><text:span text:style-name="T1"> (advancedError) {</text:span></text:span></text:p>
      <text:p text:style-name="P6"><text:span text:style-name="Source_20_Text"><text:span text:style-name="T2"><text:s text:c="6"/></text:span></text:span><text:span text:style-name="Source_20_Text"><text:span text:style-name="T4">// Auto-correction et fallback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autoCorrector.</text:span></text:span><text:span text:style-name="Source_20_Text"><text:span text:style-name="T7">reportIssue</text:span></text:span><text:span text:style-name="Source_20_Text"><text:span text:style-name="T1">(</text:span></text:span><text:span text:style-name="Source_20_Text"><text:span text:style-name="T8">'advanced_generation'</text:span></text:span><text:span text:style-name="Source_20_Text"><text:span text:style-name="T1">, advancedError);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try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4">// Fallback vers service enrichi</text:span></text:span></text:p>
      <text:p text:style-name="P6"><text:span text:style-name="Source_20_Text"><text:span text:style-name="T2"><text:s text:c="8"/></text:span></text:span><text:span text:style-name="Source_20_Text"><text:span text:style-name="T5">const</text:span></text:span><text:span text:style-name="Source_20_Text"><text:span text:style-name="T1"> result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tryEnhancedGeneration</text:span></text:span><text:span text:style-name="Source_20_Text"><text:span text:style-name="T1">(requirements);</text:span></text:span></text:p>
      <text:p text:style-name="P6"><text:span text:style-name="Source_20_Text"><text:span text:style-name="T2"><text:s text:c="8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enrichResult</text:span></text:span><text:span text:style-name="Source_20_Text"><text:span text:style-name="T1">(result, </text:span></text:span><text:span text:style-name="Source_20_Text"><text:span text:style-name="T8">'enhanced'</text:span></text:span><text:span text:style-name="Source_20_Text"><text:span text:style-name="T1">);</text:span></text:span></text:p>
      <text:p text:style-name="P6"><text:span text:style-name="Source_20_Text"><text:span text:style-name="T2"><text:s text:c="8"/></text:span></text:span></text:p>
      <text:p text:style-name="P6"><text:span text:style-name="Source_20_Text"><text:span text:style-name="T2"><text:s text:c="6"/></text:span></text:span><text:span text:style-name="Source_20_Text"><text:span text:style-name="T1">} </text:span></text:span><text:span text:style-name="Source_20_Text"><text:span text:style-name="T5">catch</text:span></text:span><text:span text:style-name="Source_20_Text"><text:span text:style-name="T1"> (enhancedError) {</text:span></text:span></text:p>
      <text:p text:style-name="P6"><text:span text:style-name="Source_20_Text"><text:span text:style-name="T2"><text:s text:c="8"/></text:span></text:span><text:span text:style-name="Source_20_Text"><text:span text:style-name="T4">// Fallback vers service de base (toujours fiable)</text:span></text:span></text:p>
      <text:p text:style-name="P6"><text:span text:style-name="Source_20_Text"><text:span text:style-name="T2"><text:s text:c="8"/></text:span></text:span><text:span text:style-name="Source_20_Text"><text:span text:style-name="T5">const</text:span></text:span><text:span text:style-name="Source_20_Text"><text:span text:style-name="T1"> result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tryBasicGeneration</text:span></text:span><text:span text:style-name="Source_20_Text"><text:span text:style-name="T1">(requirements);</text:span></text:span></text:p>
      <text:p text:style-name="P6"><text:span text:style-name="Source_20_Text"><text:span text:style-name="T2"><text:s text:c="8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enrichResult</text:span></text:span><text:span text:style-name="Source_20_Text"><text:span text:style-name="T1">(result, </text:span></text:span><text:span text:style-name="Source_20_Text"><text:span text:style-name="T8">'basic'</text:span></text:span><text:span text:style-name="Source_20_Text"><text:span text:style-name="T1">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Auto-healing setup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7">setupAutoHealing</text:span></text:span><text:span text:style-name="Source_20_Text"><text:span text:style-name="T1">(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void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healthMonitor.</text:span></text:span><text:span text:style-name="Source_20_Text"><text:span text:style-name="T7">onIssueDetected</text:span></text:span><text:span text:style-name="Source_20_Text"><text:span text:style-name="T1">(</text:span></text:span><text:span text:style-name="Source_20_Text"><text:span text:style-name="T5">async</text:span></text:span><text:span text:style-name="Source_20_Text"><text:span text:style-name="T1"> (issue)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fix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utoCorrector.</text:span></text:span><text:span text:style-name="Source_20_Text"><text:span text:style-name="T7">suggestFix</text:span></text:span><text:span text:style-name="Source_20_Text"><text:span text:style-name="T1">(issue);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fix.canAutoApply) {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utoCorrector.</text:span></text:span><text:span text:style-name="Source_20_Text"><text:span text:style-name="T7">applyFix</text:span></text:span><text:span text:style-name="Source_20_Text"><text:span text:style-name="T1">(fix);</text:span></text:span></text:p>
      <text:p text:style-name="P6"><text:span text:style-name="Source_20_Text"><text:span text:style-name="T2"><text:s text:c="8"/></text:span></text:span><text:span text:style-name="Source_20_Text"><text:span text:style-name="T1">logger.</text:span></text:span><text:span text:style-name="Source_20_Text"><text:span text:style-name="T7">info</text:span></text:span><text:span text:style-name="Source_20_Text"><text:span text:style-name="T1">(</text:span></text:span><text:span text:style-name="Source_20_Text"><text:span text:style-name="T8">`Auto-corrected issue: </text:span></text:span><text:span text:style-name="Source_20_Text"><text:span text:style-name="T1">${issue.</text:span></text:span><text:span text:style-name="Source_20_Text"><text:span text:style-name="T5">type</text:span></text:span><text:span text:style-name="Source_20_Text"><text:span text:style-name="T1">}</text:span></text:span><text:span text:style-name="Source_20_Text"><text:span text:style-name="T8">`</text:span></text:span><text:span text:style-name="Source_20_Text"><text:span text:style-name="T1">, { fix });</text:span></text:span></text:p>
      <text:p text:style-name="P6"><text:span text:style-name="Source_20_Text"><text:span text:style-name="T2"><text:s text:c="6"/></text:span></text:span><text:span text:style-name="Source_20_Text"><text:span text:style-name="T1">} </text:span></text:span><text:span text:style-name="Source_20_Text"><text:span text:style-name="T5">else</text:span></text:span><text:span text:style-name="Source_20_Text"><text:span text:style-name="T1"> {</text:span></text:span></text:p>
      <text:p text:style-name="P6"><text:soft-page-break/><text:span text:style-name="Source_20_Text"><text:span text:style-name="T2"><text:s text:c="8"/></text:span></text:span><text:span text:style-name="Source_20_Text"><text:span text:style-name="T4">// Notifier l'équipe pour intervention manuelle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notifyTeam</text:span></text:span><text:span text:style-name="Source_20_Text"><text:span text:style-name="T1">(issue, fix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</text:span></text:span></text:p>
      <text:h text:style-name="Heading_20_3" text:outline-level="3">Service Registry - Gestion Intelligente des Modules</text:h>
      <text:p text:style-name="P3">typescript</text:p>
      <text:p text:style-name="P5"><text:span text:style-name="Source_20_Text"><text:span text:style-name="T3">// Registre intelligent qui gère automatiquement les service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ServiceRegistry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servic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7">&lt;</text:span></text:span><text:span text:style-name="Source_20_Text"><text:span text:style-name="T8">string</text:span></text:span><text:span text:style-name="Source_20_Text"><text:span text:style-name="T1">, ServiceWrapper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1">()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healthCheck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7">&lt;</text:span></text:span><text:span text:style-name="Source_20_Text"><text:span text:style-name="T8">string</text:span></text:span><text:span text:style-name="Source_20_Text"><text:span text:style-name="T1">, HealthCheck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1">()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Enregistrement automatique avec health checks</text:span></text:span></text:p>
      <text:p text:style-name="P6"><text:span text:style-name="Source_20_Text"><text:span text:style-name="T2"><text:s text:c="2"/></text:span></text:span><text:span text:style-name="Source_20_Text"><text:span text:style-name="T7">register&lt;</text:span></text:span><text:span text:style-name="Source_20_Text"><text:span text:style-name="T6">T</text:span></text:span><text:span text:style-name="Source_20_Text"><text:span text:style-name="T7">&gt;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1">nam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, </text:span></text:span></text:p>
      <text:p text:style-name="P6"><text:span text:style-name="Source_20_Text"><text:span text:style-name="T2"><text:s text:c="4"/></text:span></text:span><text:span text:style-name="Source_20_Text"><text:span text:style-name="T1">servic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T</text:span></text:span><text:span text:style-name="Source_20_Text"><text:span text:style-name="T1">, </text:span></text:span></text:p>
      <text:p text:style-name="P6"><text:span text:style-name="Source_20_Text"><text:span text:style-name="T2"><text:s text:c="4"/></text:span></text:span><text:span text:style-name="Source_20_Text"><text:span text:style-name="T1">config</text:span></text:span><text:span text:style-name="Source_20_Text"><text:span text:style-name="T7">:</text:span></text:span><text:span text:style-name="Source_20_Text"><text:span text:style-name="T1"> ServiceConfig </text:span></text:span><text:span text:style-name="Source_20_Text"><text:span text:style-name="T7">=</text:span></text:span><text:span text:style-name="Source_20_Text"><text:span text:style-name="T1"> {}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void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wrapper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ServiceWrapper</text:span></text:span><text:span text:style-name="Source_20_Text"><text:span text:style-name="T1">(service, {</text:span></text:span></text:p>
      <text:p text:style-name="P6"><text:span text:style-name="Source_20_Text"><text:span text:style-name="T2"><text:s text:c="6"/></text:span></text:span><text:span text:style-name="Source_20_Text"><text:span text:style-name="T1">retries</text:span></text:span><text:span text:style-name="Source_20_Text"><text:span text:style-name="T7">:</text:span></text:span><text:span text:style-name="Source_20_Text"><text:span text:style-name="T1"> config.retries </text:span></text:span><text:span text:style-name="Source_20_Text"><text:span text:style-name="T7">||</text:span></text:span><text:span text:style-name="Source_20_Text"><text:span text:style-name="T1"> </text:span></text:span><text:span text:style-name="Source_20_Text"><text:span text:style-name="T6">3</text:span></text:span><text:span text:style-name="Source_20_Text"><text:span text:style-name="T1">,</text:span></text:span></text:p>
      <text:p text:style-name="P6"><text:span text:style-name="Source_20_Text"><text:span text:style-name="T2"><text:s text:c="6"/></text:span></text:span><text:span text:style-name="Source_20_Text"><text:span text:style-name="T1">timeout</text:span></text:span><text:span text:style-name="Source_20_Text"><text:span text:style-name="T7">:</text:span></text:span><text:span text:style-name="Source_20_Text"><text:span text:style-name="T1"> config.timeout </text:span></text:span><text:span text:style-name="Source_20_Text"><text:span text:style-name="T7">||</text:span></text:span><text:span text:style-name="Source_20_Text"><text:span text:style-name="T1"> </text:span></text:span><text:span text:style-name="Source_20_Text"><text:span text:style-name="T6">30000</text:span></text:span><text:span text:style-name="Source_20_Text"><text:span text:style-name="T1">,</text:span></text:span></text:p>
      <text:p text:style-name="P6"><text:span text:style-name="Source_20_Text"><text:span text:style-name="T2"><text:s text:c="6"/></text:span></text:span><text:span text:style-name="Source_20_Text"><text:span text:style-name="T1">fallback</text:span></text:span><text:span text:style-name="Source_20_Text"><text:span text:style-name="T7">:</text:span></text:span><text:span text:style-name="Source_20_Text"><text:span text:style-name="T1"> config.fallback,</text:span></text:span></text:p>
      <text:p text:style-name="P6"><text:span text:style-name="Source_20_Text"><text:span text:style-name="T2"><text:s text:c="6"/></text:span></text:span><text:span text:style-name="Source_20_Text"><text:span text:style-name="T1">healthCheck</text:span></text:span><text:span text:style-name="Source_20_Text"><text:span text:style-name="T7">:</text:span></text:span><text:span text:style-name="Source_20_Text"><text:span text:style-name="T1"> config.healthCheck </text:span></text:span><text:span text:style-name="Source_20_Text"><text:span text:style-name="T7">||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defaultHealthCheck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services.</text:span></text:span><text:span text:style-name="Source_20_Text"><text:span text:style-name="T7">set</text:span></text:span><text:span text:style-name="Source_20_Text"><text:span text:style-name="T1">(name, wrapper);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setupHealthMonitoring</text:span></text:span><text:span text:style-name="Source_20_Text"><text:span text:style-name="T1">(name, wrapper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Récupération avec fallback automatique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tService&lt;</text:span></text:span><text:span text:style-name="Source_20_Text"><text:span text:style-name="T6">T</text:span></text:span><text:span text:style-name="Source_20_Text"><text:span text:style-name="T7">&gt;</text:span></text:span><text:span text:style-name="Source_20_Text"><text:span text:style-name="T1">(nam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6">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wrapper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services.</text:span></text:span><text:span text:style-name="Source_20_Text"><text:span text:style-name="T7">get</text:span></text:span><text:span text:style-name="Source_20_Text"><text:span text:style-name="T1">(name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if</text:span></text:span><text:span text:style-name="Source_20_Text"><text:span text:style-name="T1"> (</text:span></text:span><text:span text:style-name="Source_20_Text"><text:span text:style-name="T7">!</text:span></text:span><text:span text:style-name="Source_20_Text"><text:span text:style-name="T1">wrapper </text:span></text:span><text:span text:style-name="Source_20_Text"><text:span text:style-name="T7">||</text:span></text:span><text:span text:style-name="Source_20_Text"><text:span text:style-name="T1"> </text:span></text:span><text:span text:style-name="Source_20_Text"><text:span text:style-name="T7">!</text:span></text:span><text:span text:style-name="Source_20_Text"><text:span text:style-name="T1">wrapper.</text:span></text:span><text:span text:style-name="Source_20_Text"><text:span text:style-name="T7">isHealthy</text:span></text:span><text:span text:style-name="Source_20_Text"><text:span text:style-name="T1">()) {</text:span></text:span></text:p>
      <text:p text:style-name="P6"><text:span text:style-name="Source_20_Text"><text:span text:style-name="T2"><text:s text:c="6"/></text:span></text:span><text:span text:style-name="Source_20_Text"><text:span text:style-name="T4">// Essayer le service de fallback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fallbackName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FallbackService</text:span></text:span><text:span text:style-name="Source_20_Text"><text:span text:style-name="T1">(name);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fallbackName) {</text:span></text:span></text:p>
      <text:p text:style-name="P6"><text:soft-page-break/><text:span text:style-name="Source_20_Text"><text:span text:style-name="T2"><text:s text:c="8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Service&lt;</text:span></text:span><text:span text:style-name="Source_20_Text"><text:span text:style-name="T6">T</text:span></text:span><text:span text:style-name="Source_20_Text"><text:span text:style-name="T7">&gt;</text:span></text:span><text:span text:style-name="Source_20_Text"><text:span text:style-name="T1">(fallbackName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6"/></text:span></text:span><text:span text:style-name="Source_20_Text"><text:span text:style-name="T5">throw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ServiceUnavailableError</text:span></text:span><text:span text:style-name="Source_20_Text"><text:span text:style-name="T1">(name)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wrapper.</text:span></text:span><text:span text:style-name="Source_20_Text"><text:span text:style-name="T7">getService&lt;</text:span></text:span><text:span text:style-name="Source_20_Text"><text:span text:style-name="T6">T</text:span></text:span><text:span text:style-name="Source_20_Text"><text:span text:style-name="T7">&gt;</text:span></text:span><text:span text:style-name="Source_20_Text"><text:span text:style-name="T1">(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Wrapper qui gère automatiquement les erreurs et fallback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ServiceWrapper</text:span></text:span><text:span text:style-name="Source_20_Text"><text:span text:style-name="T7">&lt;</text:span></text:span><text:span text:style-name="Source_20_Text"><text:span text:style-name="T6">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servic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T</text:span></text:span><text:span text:style-name="Source_20_Text"><text:span text:style-name="T1">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config</text:span></text:span><text:span text:style-name="Source_20_Text"><text:span text:style-name="T7">:</text:span></text:span><text:span text:style-name="Source_20_Text"><text:span text:style-name="T1"> ServiceConfig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isHealth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boolean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6">true</text:span></text:span><text:span text:style-name="Source_20_Text"><text:span text:style-name="T1">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consecutiveFailur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number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execute&lt;</text:span></text:span><text:span text:style-name="Source_20_Text"><text:span text:style-name="T6">R</text:span></text:span><text:span text:style-name="Source_20_Text"><text:span text:style-name="T7">&gt;</text:span></text:span><text:span text:style-name="Source_20_Text"><text:span text:style-name="T1">(metho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keyof</text:span></text:span><text:span text:style-name="Source_20_Text"><text:span text:style-name="T1"> </text:span></text:span><text:span text:style-name="Source_20_Text"><text:span text:style-name="T6">T</text:span></text:span><text:span text:style-name="Source_20_Text"><text:span text:style-name="T1">, </text:span></text:span><text:span text:style-name="Source_20_Text"><text:span text:style-name="T7">...</text:span></text:span><text:span text:style-name="Source_20_Text"><text:span text:style-name="T1">arg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any</text:span></text:span><text:span text:style-name="Source_20_Text"><text:span text:style-name="T1">[]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6">R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try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4">// Circuit breaker pattern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</text:span></text:span><text:span text:style-name="Source_20_Text"><text:span text:style-name="T5">this</text:span></text:span><text:span text:style-name="Source_20_Text"><text:span text:style-name="T1">.consecutiveFailures </text:span></text:span><text:span text:style-name="Source_20_Text"><text:span text:style-name="T7">&gt;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config.maxFailures) {</text:span></text:span></text:p>
      <text:p text:style-name="P6"><text:span text:style-name="Source_20_Text"><text:span text:style-name="T2"><text:s text:c="8"/></text:span></text:span><text:span text:style-name="Source_20_Text"><text:span text:style-name="T5">throw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CircuitBreakerOpenError</text:span></text:span><text:span text:style-name="Source_20_Text"><text:span text:style-name="T1">(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result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(</text:span></text:span><text:span text:style-name="Source_20_Text"><text:span text:style-name="T5">this</text:span></text:span><text:span text:style-name="Source_20_Text"><text:span text:style-name="T1">.service[method] </text:span></text:span><text:span text:style-name="Source_20_Text"><text:span text:style-name="T5">as</text:span></text:span><text:span text:style-name="Source_20_Text"><text:span text:style-name="T1"> </text:span></text:span><text:span text:style-name="Source_20_Text"><text:span text:style-name="T6">Function</text:span></text:span><text:span text:style-name="Source_20_Text"><text:span text:style-name="T1">)(</text:span></text:span><text:span text:style-name="Source_20_Text"><text:span text:style-name="T7">...</text:span></text:span><text:span text:style-name="Source_20_Text"><text:span text:style-name="T1">args);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consecutiveFailure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; </text:span></text:span><text:span text:style-name="Source_20_Text"><text:span text:style-name="T4">// Reset on success</text:span></text:span></text:p>
      <text:p text:style-name="P6"><text:span text:style-name="Source_20_Text"><text:span text:style-name="T2"><text:s text:c="6"/></text:span></text:span><text:span text:style-name="Source_20_Text"><text:span text:style-name="T5">return</text:span></text:span><text:span text:style-name="Source_20_Text"><text:span text:style-name="T1"> result;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4"/></text:span></text:span><text:span text:style-name="Source_20_Text"><text:span text:style-name="T1">} </text:span></text:span><text:span text:style-name="Source_20_Text"><text:span text:style-name="T5">catch</text:span></text:span><text:span text:style-name="Source_20_Text"><text:span text:style-name="T1"> (error) {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consecutiveFailures</text:span></text:span><text:span text:style-name="Source_20_Text"><text:span text:style-name="T7">++</text:span></text:span><text:span text:style-name="Source_20_Text"><text:span text:style-name="T1">;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Auto-correction si possible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correc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ttemptAutoCorrection</text:span></text:span><text:span text:style-name="Source_20_Text"><text:span text:style-name="T1">(error);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correction.success) {</text:span></text:span></text:p>
      <text:p text:style-name="P6"><text:span text:style-name="Source_20_Text"><text:span text:style-name="T2"><text:s text:c="8"/></text:span></text:span><text:span text:style-name="Source_20_Text"><text:span text:style-name="T5">return</text:span></text:span><text:span text:style-name="Source_20_Text"><text:span text:style-name="T1"> correction.result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Sinon, utiliser le fallback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</text:span></text:span><text:span text:style-name="Source_20_Text"><text:span text:style-name="T5">this</text:span></text:span><text:span text:style-name="Source_20_Text"><text:span text:style-name="T1">.config.fallback) {</text:span></text:span></text:p>
      <text:p text:style-name="P6"><text:span text:style-name="Source_20_Text"><text:span text:style-name="T2"><text:s text:c="8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config.</text:span></text:span><text:span text:style-name="Source_20_Text"><text:span text:style-name="T7">fallback</text:span></text:span><text:span text:style-name="Source_20_Text"><text:span text:style-name="T1">(method, args, error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oft-page-break/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throw</text:span></text:span><text:span text:style-name="Source_20_Text"><text:span text:style-name="T1"> error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</text:span></text:span></text:p>
      <text:p text:style-name="Horizontal_20_Line"/>
      <text:h text:style-name="Heading_20_2" text:outline-level="2">? Interopérabilité B2B - API Standardisée</text:h>
      <text:h text:style-name="Heading_20_3" text:outline-level="3">OpenAPI 3.1 Compliant</text:h>
      <text:p text:style-name="P3">typescript</text:p>
      <text:p text:style-name="P5"><text:span text:style-name="Source_20_Text"><text:span text:style-name="T3">// Configuration OpenAPI automatique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API_CONFIG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1">openapi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3.1.0'</text:span></text:span><text:span text:style-name="Source_20_Text"><text:span text:style-name="T1">,</text:span></text:span></text:p>
      <text:p text:style-name="P6"><text:span text:style-name="Source_20_Text"><text:span text:style-name="T2"><text:s text:c="2"/></text:span></text:span><text:span text:style-name="Source_20_Text"><text:span text:style-name="T1">info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titl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KitchenXpert B2B API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vers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4.1.0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descrip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API complète pour intégration partenaires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text:span text:style-name="Source_20_Text"><text:span text:style-name="T1">server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1">{ ur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https://api.kitchenxpert.com/v4'</text:span></text:span><text:span text:style-name="Source_20_Text"><text:span text:style-name="T1">, descrip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Production'</text:span></text:span><text:span text:style-name="Source_20_Text"><text:span text:style-name="T1"> },</text:span></text:span></text:p>
      <text:p text:style-name="P6"><text:span text:style-name="Source_20_Text"><text:span text:style-name="T2"><text:s text:c="4"/></text:span></text:span><text:span text:style-name="Source_20_Text"><text:span text:style-name="T1">{ ur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https://api-staging.kitchenxpert.com/v4'</text:span></text:span><text:span text:style-name="Source_20_Text"><text:span text:style-name="T1">, descrip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Staging'</text:span></text:span><text:span text:style-name="Source_20_Text"><text:span text:style-name="T1"> }</text:span></text:span></text:p>
      <text:p text:style-name="P6"><text:span text:style-name="Source_20_Text"><text:span text:style-name="T2"><text:s text:c="2"/></text:span></text:span><text:span text:style-name="Source_20_Text"><text:span text:style-name="T1">]</text:span></text:span></text:p>
      <text:p text:style-name="P6"><text:span text:style-name="Source_20_Text"><text:span text:style-name="T1">};</text:span></text:span></text:p>
      <text:p text:style-name="P6"/>
      <text:p text:style-name="P7"><text:span text:style-name="Source_20_Text"><text:span text:style-name="T3">// Controller unifié pour tous les modules</text:span></text:span></text:p>
      <text:p text:style-name="P6"><text:span text:style-name="Source_20_Text"><text:span text:style-name="T7">@ApiController</text:span></text:span><text:span text:style-name="Source_20_Text"><text:span text:style-name="T1">(</text:span></text:span><text:span text:style-name="Source_20_Text"><text:span text:style-name="T8">'/api/v4'</text:span></text:span><text:span text:style-name="Source_20_Text"><text:span text:style-name="T1">)</text:span></text:span></text:p>
      <text:p text:style-name="P6"><text:span text:style-name="Source_20_Text"><text:span text:style-name="T7">@OpenAPISpec</text:span></text:span><text:span text:style-name="Source_20_Text"><text:span text:style-name="T1">(</text:span></text:span><text:span text:style-name="Source_20_Text"><text:span text:style-name="T6">API_CONFIG</text:span></text:span><text:span text:style-name="Source_20_Text"><text:span text:style-name="T1">)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UnifiedKitchenController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Design Generation - Module indépendant</text:span></text:span></text:p>
      <text:p text:style-name="P6"><text:span text:style-name="Source_20_Text"><text:span text:style-name="T2"><text:s text:c="2"/></text:span></text:span><text:span text:style-name="Source_20_Text"><text:span text:style-name="T7">@Post</text:span></text:span><text:span text:style-name="Source_20_Text"><text:span text:style-name="T1">(</text:span></text:span><text:span text:style-name="Source_20_Text"><text:span text:style-name="T8">'/design/generate'</text:span></text:span><text:span text:style-name="Source_20_Text"><text:span text:style-name="T1">)</text:span></text:span></text:p>
      <text:p text:style-name="P6"><text:span text:style-name="Source_20_Text"><text:span text:style-name="T2"><text:s text:c="2"/></text:span></text:span><text:span text:style-name="Source_20_Text"><text:span text:style-name="T7">@ApiOperation</text:span></text:span><text:span text:style-name="Source_20_Text"><text:span text:style-name="T1">({</text:span></text:span></text:p>
      <text:p text:style-name="P6"><text:span text:style-name="Source_20_Text"><text:span text:style-name="T2"><text:s text:c="4"/></text:span></text:span><text:span text:style-name="Source_20_Text"><text:span text:style-name="T1">summar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Generate kitchen design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descrip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Generate a complete kitchen design based on requirement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tags</text:span></text:span><text:span text:style-name="Source_20_Text"><text:span text:style-name="T7">:</text:span></text:span><text:span text:style-name="Source_20_Text"><text:span text:style-name="T1"> [</text:span></text:span><text:span text:style-name="Source_20_Text"><text:span text:style-name="T8">'Design'</text:span></text:span><text:span text:style-name="Source_20_Text"><text:span text:style-name="T1">]</text:span></text:span></text:p>
      <text:p text:style-name="P6"><text:span text:style-name="Source_20_Text"><text:span text:style-name="T2"><text:s text:c="2"/></text:span></text:span><text:span text:style-name="Source_20_Text"><text:span text:style-name="T1">})</text:span></text:span></text:p>
      <text:p text:style-name="P6"><text:span text:style-name="Source_20_Text"><text:span text:style-name="T2"><text:s text:c="2"/></text:span></text:span><text:span text:style-name="Source_20_Text"><text:span text:style-name="T7">@ApiResponse</text:span></text:span><text:span text:style-name="Source_20_Text"><text:span text:style-name="T1">({ statu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200</text:span></text:span><text:span text:style-name="Source_20_Text"><text:span text:style-name="T1">, type</text:span></text:span><text:span text:style-name="Source_20_Text"><text:span text:style-name="T7">:</text:span></text:span><text:span text:style-name="Source_20_Text"><text:span text:style-name="T1"> DesignResultDto })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nerateDesign</text:span></text:span><text:span text:style-name="Source_20_Text"><text:span text:style-name="T1">(</text:span></text:span></text:p>
      <text:p text:style-name="P6"><text:soft-page-break/><text:span text:style-name="Source_20_Text"><text:span text:style-name="T2"><text:s text:c="4"/></text:span></text:span><text:span text:style-name="Source_20_Text"><text:span text:style-name="T7">@Body</text:span></text:span><text:span text:style-name="Source_20_Text"><text:span text:style-name="T1">() </text:span></text:span><text:span text:style-name="Source_20_Text"><text:span text:style-name="T7">@ApiBody</text:span></text:span><text:span text:style-name="Source_20_Text"><text:span text:style-name="T1">({ type</text:span></text:span><text:span text:style-name="Source_20_Text"><text:span text:style-name="T7">:</text:span></text:span><text:span text:style-name="Source_20_Text"><text:span text:style-name="T1"> DesignRequirementsDto }) </text:span></text:span></text:p>
      <text:p text:style-name="P6"><text:span text:style-name="Source_20_Text"><text:span text:style-name="T2"><text:s text:c="4"/></text:span></text:span><text:span text:style-name="Source_20_Text"><text:span text:style-name="T1">requirements</text:span></text:span><text:span text:style-name="Source_20_Text"><text:span text:style-name="T7">:</text:span></text:span><text:span text:style-name="Source_20_Text"><text:span text:style-name="T1"> DesignRequirementsDto,</text:span></text:span></text:p>
      <text:p text:style-name="P6"><text:span text:style-name="Source_20_Text"><text:span text:style-name="T2"><text:s text:c="4"/></text:span></text:span><text:span text:style-name="Source_20_Text"><text:span text:style-name="T7">@Headers</text:span></text:span><text:span text:style-name="Source_20_Text"><text:span text:style-name="T1">(</text:span></text:span><text:span text:style-name="Source_20_Text"><text:span text:style-name="T8">'x-partner-id'</text:span></text:span><text:span text:style-name="Source_20_Text"><text:span text:style-name="T1">) partnerId</text:span></text:span><text:span text:style-name="Source_20_Text"><text:span text:style-name="T7">?:</text:span></text:span><text:span text:style-name="Source_20_Text"><text:span text:style-name="T1"> </text:span></text:span><text:span text:style-name="Source_20_Text"><text:span text:style-name="T8">string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DesignResultDto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4">// Validation automatique avec correction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validatedRequirement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validator.</text:span></text:span><text:span text:style-name="Source_20_Text"><text:span text:style-name="T7">validateAndCorrect</text:span></text:span><text:span text:style-name="Source_20_Text"><text:span text:style-name="T1">(</text:span></text:span></text:p>
      <text:p text:style-name="P6"><text:span text:style-name="Source_20_Text"><text:span text:style-name="T2"><text:s text:c="6"/></text:span></text:span><text:span text:style-name="Source_20_Text"><text:span text:style-name="T1">requirements,</text:span></text:span></text:p>
      <text:p text:style-name="P6"><text:span text:style-name="Source_20_Text"><text:span text:style-name="T2"><text:s text:c="6"/></text:span></text:span><text:span text:style-name="Source_20_Text"><text:span text:style-name="T1">partnerId</text:span></text:span></text:p>
      <text:p text:style-name="P6"><text:span text:style-name="Source_20_Text"><text:span text:style-name="T2"><text:s text:c="4"/></text:span></text:span><text:span text:style-name="Source_20_Text"><text:span text:style-name="T1">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Génération avec contexte partenaire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result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designEngine.</text:span></text:span><text:span text:style-name="Source_20_Text"><text:span text:style-name="T7">generateDesign</text:span></text:span><text:span text:style-name="Source_20_Text"><text:span text:style-name="T1">(</text:span></text:span></text:p>
      <text:p text:style-name="P6"><text:span text:style-name="Source_20_Text"><text:span text:style-name="T2"><text:s text:c="6"/></text:span></text:span><text:span text:style-name="Source_20_Text"><text:span text:style-name="T1">validatedRequirements,</text:span></text:span></text:p>
      <text:p text:style-name="P6"><text:span text:style-name="Source_20_Text"><text:span text:style-name="T2"><text:s text:c="6"/></text:span></text:span><text:span text:style-name="Source_20_Text"><text:span text:style-name="T1">{ partnerId }</text:span></text:span></text:p>
      <text:p text:style-name="P6"><text:span text:style-name="Source_20_Text"><text:span text:style-name="T2"><text:s text:c="4"/></text:span></text:span><text:span text:style-name="Source_20_Text"><text:span text:style-name="T1">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responseFormatter.</text:span></text:span><text:span text:style-name="Source_20_Text"><text:span text:style-name="T7">format</text:span></text:span><text:span text:style-name="Source_20_Text"><text:span text:style-name="T1">(result, partnerId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Style Analysis - Module indépendant</text:span></text:span></text:p>
      <text:p text:style-name="P6"><text:span text:style-name="Source_20_Text"><text:span text:style-name="T2"><text:s text:c="2"/></text:span></text:span><text:span text:style-name="Source_20_Text"><text:span text:style-name="T7">@Post</text:span></text:span><text:span text:style-name="Source_20_Text"><text:span text:style-name="T1">(</text:span></text:span><text:span text:style-name="Source_20_Text"><text:span text:style-name="T8">'/analysis/style'</text:span></text:span><text:span text:style-name="Source_20_Text"><text:span text:style-name="T1">)</text:span></text:span></text:p>
      <text:p text:style-name="P6"><text:span text:style-name="Source_20_Text"><text:span text:style-name="T2"><text:s text:c="2"/></text:span></text:span><text:span text:style-name="Source_20_Text"><text:span text:style-name="T7">@ApiOperation</text:span></text:span><text:span text:style-name="Source_20_Text"><text:span text:style-name="T1">({</text:span></text:span></text:p>
      <text:p text:style-name="P6"><text:span text:style-name="Source_20_Text"><text:span text:style-name="T2"><text:s text:c="4"/></text:span></text:span><text:span text:style-name="Source_20_Text"><text:span text:style-name="T1">summar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Analyze kitchen style from imag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tags</text:span></text:span><text:span text:style-name="Source_20_Text"><text:span text:style-name="T7">:</text:span></text:span><text:span text:style-name="Source_20_Text"><text:span text:style-name="T1"> [</text:span></text:span><text:span text:style-name="Source_20_Text"><text:span text:style-name="T8">'Analysis'</text:span></text:span><text:span text:style-name="Source_20_Text"><text:span text:style-name="T1">]</text:span></text:span></text:p>
      <text:p text:style-name="P6"><text:span text:style-name="Source_20_Text"><text:span text:style-name="T2"><text:s text:c="2"/></text:span></text:span><text:span text:style-name="Source_20_Text"><text:span text:style-name="T1">})</text:span></text:span></text:p>
      <text:p text:style-name="P6"><text:span text:style-name="Source_20_Text"><text:span text:style-name="T2"><text:s text:c="2"/></text:span></text:span><text:span text:style-name="Source_20_Text"><text:span text:style-name="T7">@ApiConsumes</text:span></text:span><text:span text:style-name="Source_20_Text"><text:span text:style-name="T1">(</text:span></text:span><text:span text:style-name="Source_20_Text"><text:span text:style-name="T8">'multipart/form-data'</text:span></text:span><text:span text:style-name="Source_20_Text"><text:span text:style-name="T1">)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analyzeStyle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7">@UploadedFile</text:span></text:span><text:span text:style-name="Source_20_Text"><text:span text:style-name="T1">() </text:span></text:span><text:span text:style-name="Source_20_Text"><text:span text:style-name="T7">@ApiFile</text:span></text:span><text:span text:style-name="Source_20_Text"><text:span text:style-name="T1">() image</text:span></text:span><text:span text:style-name="Source_20_Text"><text:span text:style-name="T7">:</text:span></text:span><text:span text:style-name="Source_20_Text"><text:span text:style-name="T1"> Express.Multer.File,</text:span></text:span></text:p>
      <text:p text:style-name="P6"><text:span text:style-name="Source_20_Text"><text:span text:style-name="T2"><text:s text:c="4"/></text:span></text:span><text:span text:style-name="Source_20_Text"><text:span text:style-name="T7">@Query</text:span></text:span><text:span text:style-name="Source_20_Text"><text:span text:style-name="T1">(</text:span></text:span><text:span text:style-name="Source_20_Text"><text:span text:style-name="T8">'confidence_threshold'</text:span></text:span><text:span text:style-name="Source_20_Text"><text:span text:style-name="T1">) confidenceThreshol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number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6">0.7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StyleAnalysisDto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4">// Analyse avec fallbacks automatiques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styleAnalyzer.</text:span></text:span><text:span text:style-name="Source_20_Text"><text:span text:style-name="T7">analyze</text:span></text:span><text:span text:style-name="Source_20_Text"><text:span text:style-name="T1">(image, { confidenceThreshold }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Catalog Integration - Module indépendant</text:span></text:span></text:p>
      <text:p text:style-name="P6"><text:span text:style-name="Source_20_Text"><text:span text:style-name="T2"><text:s text:c="2"/></text:span></text:span><text:span text:style-name="Source_20_Text"><text:span text:style-name="T7">@Get</text:span></text:span><text:span text:style-name="Source_20_Text"><text:span text:style-name="T1">(</text:span></text:span><text:span text:style-name="Source_20_Text"><text:span text:style-name="T8">'/catalog/products'</text:span></text:span><text:span text:style-name="Source_20_Text"><text:span text:style-name="T1">)</text:span></text:span></text:p>
      <text:p text:style-name="P6"><text:span text:style-name="Source_20_Text"><text:span text:style-name="T2"><text:s text:c="2"/></text:span></text:span><text:span text:style-name="Source_20_Text"><text:span text:style-name="T7">@ApiOperation</text:span></text:span><text:span text:style-name="Source_20_Text"><text:span text:style-name="T1">({</text:span></text:span></text:p>
      <text:p text:style-name="P6"><text:span text:style-name="Source_20_Text"><text:span text:style-name="T2"><text:s text:c="4"/></text:span></text:span><text:span text:style-name="Source_20_Text"><text:span text:style-name="T1">summar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Search products in unified catalog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tags</text:span></text:span><text:span text:style-name="Source_20_Text"><text:span text:style-name="T7">:</text:span></text:span><text:span text:style-name="Source_20_Text"><text:span text:style-name="T1"> [</text:span></text:span><text:span text:style-name="Source_20_Text"><text:span text:style-name="T8">'Catalog'</text:span></text:span><text:span text:style-name="Source_20_Text"><text:span text:style-name="T1">]</text:span></text:span></text:p>
      <text:p text:style-name="P6"><text:span text:style-name="Source_20_Text"><text:span text:style-name="T2"><text:s text:c="2"/></text:span></text:span><text:span text:style-name="Source_20_Text"><text:span text:style-name="T1">})</text:span></text:span></text:p>
      <text:p text:style-name="P6"><text:soft-page-break/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searchProducts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7">@Query</text:span></text:span><text:span text:style-name="Source_20_Text"><text:span text:style-name="T1">() </text:span></text:span><text:span text:style-name="Source_20_Text"><text:span text:style-name="T7">@ApiQuery</text:span></text:span><text:span text:style-name="Source_20_Text"><text:span text:style-name="T1">({ type</text:span></text:span><text:span text:style-name="Source_20_Text"><text:span text:style-name="T7">:</text:span></text:span><text:span text:style-name="Source_20_Text"><text:span text:style-name="T1"> ProductSearchDto }) </text:span></text:span></text:p>
      <text:p text:style-name="P6"><text:span text:style-name="Source_20_Text"><text:span text:style-name="T2"><text:s text:c="4"/></text:span></text:span><text:span text:style-name="Source_20_Text"><text:span text:style-name="T1">searchParams</text:span></text:span><text:span text:style-name="Source_20_Text"><text:span text:style-name="T7">:</text:span></text:span><text:span text:style-name="Source_20_Text"><text:span text:style-name="T1"> ProductSearchDto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ProductSearchResultDto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catalogService.</text:span></text:span><text:span text:style-name="Source_20_Text"><text:span text:style-name="T7">search</text:span></text:span><text:span text:style-name="Source_20_Text"><text:span text:style-name="T1">(searchParams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Sustainability Analysis - Module indépendant</text:span></text:span></text:p>
      <text:p text:style-name="P6"><text:span text:style-name="Source_20_Text"><text:span text:style-name="T2"><text:s text:c="2"/></text:span></text:span><text:span text:style-name="Source_20_Text"><text:span text:style-name="T7">@Post</text:span></text:span><text:span text:style-name="Source_20_Text"><text:span text:style-name="T1">(</text:span></text:span><text:span text:style-name="Source_20_Text"><text:span text:style-name="T8">'/sustainability/analyze'</text:span></text:span><text:span text:style-name="Source_20_Text"><text:span text:style-name="T1">)</text:span></text:span></text:p>
      <text:p text:style-name="P6"><text:span text:style-name="Source_20_Text"><text:span text:style-name="T2"><text:s text:c="2"/></text:span></text:span><text:span text:style-name="Source_20_Text"><text:span text:style-name="T7">@ApiOperation</text:span></text:span><text:span text:style-name="Source_20_Text"><text:span text:style-name="T1">({</text:span></text:span></text:p>
      <text:p text:style-name="P6"><text:span text:style-name="Source_20_Text"><text:span text:style-name="T2"><text:s text:c="4"/></text:span></text:span><text:span text:style-name="Source_20_Text"><text:span text:style-name="T1">summar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Analyze design sustainability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tags</text:span></text:span><text:span text:style-name="Source_20_Text"><text:span text:style-name="T7">:</text:span></text:span><text:span text:style-name="Source_20_Text"><text:span text:style-name="T1"> [</text:span></text:span><text:span text:style-name="Source_20_Text"><text:span text:style-name="T8">'Sustainability'</text:span></text:span><text:span text:style-name="Source_20_Text"><text:span text:style-name="T1">]</text:span></text:span></text:p>
      <text:p text:style-name="P6"><text:span text:style-name="Source_20_Text"><text:span text:style-name="T2"><text:s text:c="2"/></text:span></text:span><text:span text:style-name="Source_20_Text"><text:span text:style-name="T1">})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analyzeSustainability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7">@Body</text:span></text:span><text:span text:style-name="Source_20_Text"><text:span text:style-name="T1">() </text:span></text:span><text:span text:style-name="Source_20_Text"><text:span text:style-name="T7">@ApiBody</text:span></text:span><text:span text:style-name="Source_20_Text"><text:span text:style-name="T1">({ type</text:span></text:span><text:span text:style-name="Source_20_Text"><text:span text:style-name="T7">:</text:span></text:span><text:span text:style-name="Source_20_Text"><text:span text:style-name="T1"> SustainabilityRequestDto }) </text:span></text:span></text:p>
      <text:p text:style-name="P6"><text:span text:style-name="Source_20_Text"><text:span text:style-name="T2"><text:s text:c="4"/></text:span></text:span><text:span text:style-name="Source_20_Text"><text:span text:style-name="T1">request</text:span></text:span><text:span text:style-name="Source_20_Text"><text:span text:style-name="T7">:</text:span></text:span><text:span text:style-name="Source_20_Text"><text:span text:style-name="T1"> SustainabilityRequestDto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SustainabilityReportDto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sustainabilityAnalyzer.</text:span></text:span><text:span text:style-name="Source_20_Text"><text:span text:style-name="T7">analyze</text:span></text:span><text:span text:style-name="Source_20_Text"><text:span text:style-name="T1">(request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GraphQL Schema pour requêtes complexes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GRAPHQL_SCHEMA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8">`</text:span></text:span></text:p>
      <text:p text:style-name="P6"><text:span text:style-name="Source_20_Text"><text:span text:style-name="T2"><text:s text:c="2"/></text:span></text:span><text:span text:style-name="Source_20_Text"><text:span text:style-name="T1">type Query {</text:span></text:span></text:p>
      <text:p text:style-name="P6"><text:span text:style-name="Source_20_Text"><text:span text:style-name="T2"><text:s text:c="4"/></text:span></text:span><text:span text:style-name="Source_20_Text"><text:span text:style-name="T1"># Design queries</text:span></text:span></text:p>
      <text:p text:style-name="P6"><text:span text:style-name="Source_20_Text"><text:span text:style-name="T2"><text:s text:c="4"/></text:span></text:span><text:span text:style-name="Source_20_Text"><text:span text:style-name="T1">design(id: ID!): Design</text:span></text:span></text:p>
      <text:p text:style-name="P6"><text:span text:style-name="Source_20_Text"><text:span text:style-name="T2"><text:s text:c="4"/></text:span></text:span><text:span text:style-name="Source_20_Text"><text:span text:style-name="T1">designs(filter: DesignFilter): [Design!]!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# Product queries</text:span></text:span></text:p>
      <text:p text:style-name="P6"><text:span text:style-name="Source_20_Text"><text:span text:style-name="T2"><text:s text:c="4"/></text:span></text:span><text:span text:style-name="Source_20_Text"><text:span text:style-name="T1">product(id: ID!): Product</text:span></text:span></text:p>
      <text:p text:style-name="P6"><text:span text:style-name="Source_20_Text"><text:span text:style-name="T2"><text:s text:c="4"/></text:span></text:span><text:span text:style-name="Source_20_Text"><text:span text:style-name="T1">products(search: ProductSearch): ProductConnection!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# Analysis queries</text:span></text:span></text:p>
      <text:p text:style-name="P6"><text:span text:style-name="Source_20_Text"><text:span text:style-name="T2"><text:s text:c="4"/></text:span></text:span><text:span text:style-name="Source_20_Text"><text:span text:style-name="T1">analyzeCompatibility(products: [ID!]!): CompatibilityResult!</text:span></text:span></text:p>
      <text:p text:style-name="P6"><text:span text:style-name="Source_20_Text"><text:span text:style-name="T2"><text:s text:c="4"/></text:span></text:span><text:span text:style-name="Source_20_Text"><text:span text:style-name="T1">predictPerformance(design: DesignInput!): PerformanceResult!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1">type Mutation {</text:span></text:span></text:p>
      <text:p text:style-name="P6"><text:span text:style-name="Source_20_Text"><text:span text:style-name="T2"><text:s text:c="4"/></text:span></text:span><text:span text:style-name="Source_20_Text"><text:span text:style-name="T1"># Design mutations</text:span></text:span></text:p>
      <text:p text:style-name="P6"><text:span text:style-name="Source_20_Text"><text:span text:style-name="T2"><text:s text:c="4"/></text:span></text:span><text:span text:style-name="Source_20_Text"><text:span text:style-name="T1">generateDesign(requirements: DesignRequirements!): Design!</text:span></text:span></text:p>
      <text:p text:style-name="P6"><text:soft-page-break/><text:span text:style-name="Source_20_Text"><text:span text:style-name="T2"><text:s text:c="4"/></text:span></text:span><text:span text:style-name="Source_20_Text"><text:span text:style-name="T1">optimizeDesign(id: ID!, goals: [OptimizationGoal!]!): Design!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# Catalog mutations</text:span></text:span></text:p>
      <text:p text:style-name="P6"><text:span text:style-name="Source_20_Text"><text:span text:style-name="T2"><text:s text:c="4"/></text:span></text:span><text:span text:style-name="Source_20_Text"><text:span text:style-name="T1">uploadCatalog(partnerId: ID!, catalog: CatalogInput!): CatalogUploadResult!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1">type Subscription {</text:span></text:span></text:p>
      <text:p text:style-name="P6"><text:span text:style-name="Source_20_Text"><text:span text:style-name="T2"><text:s text:c="4"/></text:span></text:span><text:span text:style-name="Source_20_Text"><text:span text:style-name="T1"># Real-time updates</text:span></text:span></text:p>
      <text:p text:style-name="P6"><text:span text:style-name="Source_20_Text"><text:span text:style-name="T2"><text:s text:c="4"/></text:span></text:span><text:span text:style-name="Source_20_Text"><text:span text:style-name="T1">designProgress(designId: ID!): DesignProgress!</text:span></text:span></text:p>
      <text:p text:style-name="P6"><text:span text:style-name="Source_20_Text"><text:span text:style-name="T2"><text:s text:c="4"/></text:span></text:span><text:span text:style-name="Source_20_Text"><text:span text:style-name="T1">catalogSync(partnerId: ID!): CatalogSyncStatus!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8">`</text:span></text:span><text:span text:style-name="Source_20_Text"><text:span text:style-name="T1">;</text:span></text:span></text:p>
      <text:h text:style-name="Heading_20_3" text:outline-level="3">SDK Automatique pour Partenaires</text:h>
      <text:p text:style-name="P3">typescript</text:p>
      <text:p text:style-name="P5"><text:span text:style-name="Source_20_Text"><text:span text:style-name="T3">// Génération automatique de SDK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SDKGenerator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static</text:span></text:span><text:span text:style-name="Source_20_Text"><text:span text:style-name="T1"> </text:span></text:span><text:span text:style-name="Source_20_Text"><text:span text:style-name="T7">generateForLanguage</text:span></text:span><text:span text:style-name="Source_20_Text"><text:span text:style-name="T1">(languag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ypescript'</text:span></text:span><text:span text:style-name="Source_20_Text"><text:span text:style-name="T1"> </text:span></text:span><text:span text:style-name="Source_20_Text"><text:span text:style-name="T7">|</text:span></text:span><text:span text:style-name="Source_20_Text"><text:span text:style-name="T1"> </text:span></text:span><text:span text:style-name="Source_20_Text"><text:span text:style-name="T8">'python'</text:span></text:span><text:span text:style-name="Source_20_Text"><text:span text:style-name="T1"> </text:span></text:span><text:span text:style-name="Source_20_Text"><text:span text:style-name="T7">|</text:span></text:span><text:span text:style-name="Source_20_Text"><text:span text:style-name="T1"> </text:span></text:span><text:span text:style-name="Source_20_Text"><text:span text:style-name="T8">'php'</text:span></text:span><text:span text:style-name="Source_20_Text"><text:span text:style-name="T1"> </text:span></text:span><text:span text:style-name="Source_20_Text"><text:span text:style-name="T7">|</text:span></text:span><text:span text:style-name="Source_20_Text"><text:span text:style-name="T1"> </text:span></text:span><text:span text:style-name="Source_20_Text"><text:span text:style-name="T8">'java'</text:span></text:span><text:span text:style-name="Source_20_Text"><text:span text:style-name="T1">) {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4">// SDK TypeScript/JavaScript</text:span></text:span></text:p>
      <text:p text:style-name="P6"><text:span text:style-name="Source_20_Text"><text:span text:style-name="T2"><text:s text:c="6"/></text:span></text:span><text:span text:style-name="Source_20_Text"><text:span text:style-name="T1">typescrip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TypeScriptSDK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SDK Python</text:span></text:span></text:p>
      <text:p text:style-name="P6"><text:span text:style-name="Source_20_Text"><text:span text:style-name="T2"><text:s text:c="6"/></text:span></text:span><text:span text:style-name="Source_20_Text"><text:span text:style-name="T1">pyth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PythonSDK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SDK PHP</text:span></text:span></text:p>
      <text:p text:style-name="P6"><text:span text:style-name="Source_20_Text"><text:span text:style-name="T2"><text:s text:c="6"/></text:span></text:span><text:span text:style-name="Source_20_Text"><text:span text:style-name="T1">php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PHPSDK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SDK Java</text:span></text:span></text:p>
      <text:p text:style-name="P6"><text:span text:style-name="Source_20_Text"><text:span text:style-name="T2"><text:s text:c="6"/></text:span></text:span><text:span text:style-name="Source_20_Text"><text:span text:style-name="T1">java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JavaSDK</text:span></text:span><text:span text:style-name="Source_20_Text"><text:span text:style-name="T1">()</text:span></text:span></text:p>
      <text:p text:style-name="P6"><text:span text:style-name="Source_20_Text"><text:span text:style-name="T2"><text:s text:c="4"/></text:span></text:span><text:span text:style-name="Source_20_Text"><text:span text:style-name="T1">}[language]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static</text:span></text:span><text:span text:style-name="Source_20_Text"><text:span text:style-name="T1"> </text:span></text:span><text:span text:style-name="Source_20_Text"><text:span text:style-name="T7">generateTypeScriptSDK</text:span></text:span><text:span text:style-name="Source_20_Text"><text:span text:style-name="T1">() {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8">`</text:span></text:span></text:p>
      <text:p text:style-name="P6"><text:span text:style-name="Source_20_Text"><text:span text:style-name="T1">// Auto-generated KitchenXpert SDK</text:span></text:span></text:p>
      <text:p text:style-name="P6"><text:span text:style-name="Source_20_Text"><text:span text:style-name="T1">class KitchenXpertClient {</text:span></text:span></text:p>
      <text:p text:style-name="P6"><text:span text:style-name="Source_20_Text"><text:span text:style-name="T2"><text:s text:c="2"/></text:span></text:span><text:span text:style-name="Source_20_Text"><text:span text:style-name="T1">constructor(apiKey: string, options?: ClientOptions) {</text:span></text:span></text:p>
      <text:p text:style-name="P6"><text:span text:style-name="Source_20_Text"><text:span text:style-name="T2"><text:s text:c="4"/></text:span></text:span><text:span text:style-name="Source_20_Text"><text:span text:style-name="T1">this.setupClient(apiKey, options);</text:span></text:span></text:p>
      <text:p text:style-name="P6"><text:soft-page-break/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1">// Design module</text:span></text:span></text:p>
      <text:p text:style-name="P6"><text:span text:style-name="Source_20_Text"><text:span text:style-name="T2"><text:s text:c="2"/></text:span></text:span><text:span text:style-name="Source_20_Text"><text:span text:style-name="T1">design = {</text:span></text:span></text:p>
      <text:p text:style-name="P6"><text:span text:style-name="Source_20_Text"><text:span text:style-name="T2"><text:s text:c="4"/></text:span></text:span><text:span text:style-name="Source_20_Text"><text:span text:style-name="T1">generate: (requirements: DesignRequirements) =&gt; </text:span></text:span></text:p>
      <text:p text:style-name="P6"><text:span text:style-name="Source_20_Text"><text:span text:style-name="T2"><text:s text:c="6"/></text:span></text:span><text:span text:style-name="Source_20_Text"><text:span text:style-name="T1">this.post('/design/generate', requirements),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optimize: (designId: string, goals: OptimizationGoal[]) =&gt; </text:span></text:span></text:p>
      <text:p text:style-name="P6"><text:span text:style-name="Source_20_Text"><text:span text:style-name="T2"><text:s text:c="6"/></text:span></text:span><text:span text:style-name="Source_20_Text"><text:span text:style-name="T1">this.post(\`/design/\${designId}/optimize\`, { goals }),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validate: (design: Design) =&gt; </text:span></text:span></text:p>
      <text:p text:style-name="P6"><text:span text:style-name="Source_20_Text"><text:span text:style-name="T2"><text:s text:c="6"/></text:span></text:span><text:span text:style-name="Source_20_Text"><text:span text:style-name="T1">this.post('/design/validate', design)</text:span></text:span></text:p>
      <text:p text:style-name="P6"><text:span text:style-name="Source_20_Text"><text:span text:style-name="T2"><text:s text:c="2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1">// Analysis module</text:span></text:span></text:p>
      <text:p text:style-name="P6"><text:span text:style-name="Source_20_Text"><text:span text:style-name="T2"><text:s text:c="2"/></text:span></text:span><text:span text:style-name="Source_20_Text"><text:span text:style-name="T1">analysis = {</text:span></text:span></text:p>
      <text:p text:style-name="P6"><text:span text:style-name="Source_20_Text"><text:span text:style-name="T2"><text:s text:c="4"/></text:span></text:span><text:span text:style-name="Source_20_Text"><text:span text:style-name="T1">style: (image: File) =&gt; </text:span></text:span></text:p>
      <text:p text:style-name="P6"><text:span text:style-name="Source_20_Text"><text:span text:style-name="T2"><text:s text:c="6"/></text:span></text:span><text:span text:style-name="Source_20_Text"><text:span text:style-name="T1">this.upload('/analysis/style', image),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sustainability: (design: Design) =&gt; </text:span></text:span></text:p>
      <text:p text:style-name="P6"><text:span text:style-name="Source_20_Text"><text:span text:style-name="T2"><text:s text:c="6"/></text:span></text:span><text:span text:style-name="Source_20_Text"><text:span text:style-name="T1">this.post('/sustainability/analyze', design),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ergonomics: (design: Design) =&gt; </text:span></text:span></text:p>
      <text:p text:style-name="P6"><text:span text:style-name="Source_20_Text"><text:span text:style-name="T2"><text:s text:c="6"/></text:span></text:span><text:span text:style-name="Source_20_Text"><text:span text:style-name="T1">this.post('/analysis/ergonomics', design)</text:span></text:span></text:p>
      <text:p text:style-name="P6"><text:span text:style-name="Source_20_Text"><text:span text:style-name="T2"><text:s text:c="2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1">// Catalog module</text:span></text:span></text:p>
      <text:p text:style-name="P6"><text:span text:style-name="Source_20_Text"><text:span text:style-name="T2"><text:s text:c="2"/></text:span></text:span><text:span text:style-name="Source_20_Text"><text:span text:style-name="T1">catalog = {</text:span></text:span></text:p>
      <text:p text:style-name="P6"><text:span text:style-name="Source_20_Text"><text:span text:style-name="T2"><text:s text:c="4"/></text:span></text:span><text:span text:style-name="Source_20_Text"><text:span text:style-name="T1">search: (query: ProductSearch) =&gt; </text:span></text:span></text:p>
      <text:p text:style-name="P6"><text:span text:style-name="Source_20_Text"><text:span text:style-name="T2"><text:s text:c="6"/></text:span></text:span><text:span text:style-name="Source_20_Text"><text:span text:style-name="T1">this.get('/catalog/products', query),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upload: (catalog: CatalogData) =&gt; </text:span></text:span></text:p>
      <text:p text:style-name="P6"><text:span text:style-name="Source_20_Text"><text:span text:style-name="T2"><text:s text:c="6"/></text:span></text:span><text:span text:style-name="Source_20_Text"><text:span text:style-name="T1">this.post('/catalog/upload', catalog),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1">sync: (partnerId: string) =&gt; </text:span></text:span></text:p>
      <text:p text:style-name="P6"><text:span text:style-name="Source_20_Text"><text:span text:style-name="T2"><text:s text:c="6"/></text:span></text:span><text:span text:style-name="Source_20_Text"><text:span text:style-name="T1">this.post(\`/catalog/\${partnerId}/sync\`)</text:span></text:span></text:p>
      <text:p text:style-name="P6"><text:span text:style-name="Source_20_Text"><text:span text:style-name="T2"><text:s text:c="2"/></text:span></text:span><text:span text:style-name="Source_20_Text"><text:span text:style-name="T1">};</text:span></text:span></text:p>
      <text:p text:style-name="P6"><text:span text:style-name="Source_20_Text"><text:span text:style-name="T8">}`</text:span></text:span><text:span text:style-name="Source_20_Text"><text:span text:style-name="T1">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</text:span></text:span></text:p>
      <text:p text:style-name="Horizontal_20_Line"><text:soft-page-break/></text:p>
      <text:h text:style-name="Heading_20_2" text:outline-level="2">? Couche No-Code pour Partenaires</text:h>
      <text:h text:style-name="Heading_20_3" text:outline-level="3">Visual Constraint Builder</text:h>
      <text:p text:style-name="P3">typescript</text:p>
      <text:p text:style-name="P5"><text:span text:style-name="Source_20_Text"><text:span text:style-name="T3">// Interface no-code pour définir des contrainte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VisualConstraintBuilder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constraintEditor</text:span></text:span><text:span text:style-name="Source_20_Text"><text:span text:style-name="T7">:</text:span></text:span><text:span text:style-name="Source_20_Text"><text:span text:style-name="T1"> ConstraintEditor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previewEngine</text:span></text:span><text:span text:style-name="Source_20_Text"><text:span text:style-name="T7">:</text:span></text:span><text:span text:style-name="Source_20_Text"><text:span text:style-name="T1"> PreviewEngine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validationEngine</text:span></text:span><text:span text:style-name="Source_20_Text"><text:span text:style-name="T7">:</text:span></text:span><text:span text:style-name="Source_20_Text"><text:span text:style-name="T1"> ValidationEngine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Interface drag-and-drop pour créer des règles</text:span></text:span></text:p>
      <text:p text:style-name="P6"><text:span text:style-name="Source_20_Text"><text:span text:style-name="T2"><text:s text:c="2"/></text:span></text:span><text:span text:style-name="Source_20_Text"><text:span text:style-name="T7">createConstraintInterface</text:span></text:span><text:span text:style-name="Source_20_Text"><text:span text:style-name="T1">(partnerI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ConstraintBuilderUI {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4">// Zones de contraintes visuelles</text:span></text:span></text:p>
      <text:p text:style-name="P6"><text:span text:style-name="Source_20_Text"><text:span text:style-name="T2"><text:s text:c="6"/></text:span></text:span><text:span text:style-name="Source_20_Text"><text:span text:style-name="T1">spatialConstraint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SpatialEditor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Règles de style visuelles</text:span></text:span></text:p>
      <text:p text:style-name="P6"><text:span text:style-name="Source_20_Text"><text:span text:style-name="T2"><text:s text:c="6"/></text:span></text:span><text:span text:style-name="Source_20_Text"><text:span text:style-name="T1">styleRul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StyleEditor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Contraintes de budget</text:span></text:span></text:p>
      <text:p text:style-name="P6"><text:span text:style-name="Source_20_Text"><text:span text:style-name="T2"><text:s text:c="6"/></text:span></text:span><text:span text:style-name="Source_20_Text"><text:span text:style-name="T1">budgetRul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BudgetEditor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Règles d'ergonomie personnalisées</text:span></text:span></text:p>
      <text:p text:style-name="P6"><text:span text:style-name="Source_20_Text"><text:span text:style-name="T2"><text:s text:c="6"/></text:span></text:span><text:span text:style-name="Source_20_Text"><text:span text:style-name="T1">ergonomicsRul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ErgonomicsEditor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Prévisualisation en temps réel</text:span></text:span></text:p>
      <text:p text:style-name="P6"><text:span text:style-name="Source_20_Text"><text:span text:style-name="T2"><text:s text:c="6"/></text:span></text:span><text:span text:style-name="Source_20_Text"><text:span text:style-name="T1">preview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PreviewPanel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Validation automatique</text:span></text:span></text:p>
      <text:p text:style-name="P6"><text:span text:style-name="Source_20_Text"><text:span text:style-name="T2"><text:s text:c="6"/></text:span></text:span><text:span text:style-name="Source_20_Text"><text:span text:style-name="T1">valid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ValidationPanel</text:span></text:span><text:span text:style-name="Source_20_Text"><text:span text:style-name="T1">(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Génération automatique de code à partir de l'interface visuelle</text:span></text:span></text:p>
      <text:p text:style-name="P6"><text:span text:style-name="Source_20_Text"><text:span text:style-name="T2"><text:s text:c="2"/></text:span></text:span><text:span text:style-name="Source_20_Text"><text:span text:style-name="T7">generateConstraintCode</text:span></text:span><text:span text:style-name="Source_20_Text"><text:span text:style-name="T1">(visualConstraints</text:span></text:span><text:span text:style-name="Source_20_Text"><text:span text:style-name="T7">:</text:span></text:span><text:span text:style-name="Source_20_Text"><text:span text:style-name="T1"> VisualConstraint[])</text:span></text:span><text:span text:style-name="Source_20_Text"><text:span text:style-name="T7">:</text:span></text:span><text:span text:style-name="Source_20_Text"><text:span text:style-name="T1"> ConstraintCode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ode </text:span></text:span><text:span text:style-name="Source_20_Text"><text:span text:style-name="T7">=</text:span></text:span><text:span text:style-name="Source_20_Text"><text:span text:style-name="T1"> visualConstraints.</text:span></text:span><text:span text:style-name="Source_20_Text"><text:span text:style-name="T7">map</text:span></text:span><text:span text:style-name="Source_20_Text"><text:span text:style-name="T1">(constraint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5">switch</text:span></text:span><text:span text:style-name="Source_20_Text"><text:span text:style-name="T1"> (constraint.type) {</text:span></text:span></text:p>
      <text:p text:style-name="P6"><text:span text:style-name="Source_20_Text"><text:span text:style-name="T2"><text:s text:c="8"/></text:span></text:span><text:span text:style-name="Source_20_Text"><text:span text:style-name="T5">case</text:span></text:span><text:span text:style-name="Source_20_Text"><text:span text:style-name="T1"> </text:span></text:span><text:span text:style-name="Source_20_Text"><text:span text:style-name="T8">'spatial'</text:span></text:span><text:span text:style-name="Source_20_Text"><text:span text:style-name="T7">:</text:span></text:span></text:p>
      <text:p text:style-name="P6"><text:soft-page-break/><text:span text:style-name="Source_20_Text"><text:span text:style-name="T2"><text:s text:c="10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SpatialConstraintCode</text:span></text:span><text:span text:style-name="Source_20_Text"><text:span text:style-name="T1">(constraint);</text:span></text:span></text:p>
      <text:p text:style-name="P6"><text:span text:style-name="Source_20_Text"><text:span text:style-name="T2"><text:s text:c="8"/></text:span></text:span><text:span text:style-name="Source_20_Text"><text:span text:style-name="T5">case</text:span></text:span><text:span text:style-name="Source_20_Text"><text:span text:style-name="T1"> </text:span></text:span><text:span text:style-name="Source_20_Text"><text:span text:style-name="T8">'style'</text:span></text:span><text:span text:style-name="Source_20_Text"><text:span text:style-name="T7">:</text:span></text:span></text:p>
      <text:p text:style-name="P6"><text:span text:style-name="Source_20_Text"><text:span text:style-name="T2"><text:s text:c="10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StyleConstraintCode</text:span></text:span><text:span text:style-name="Source_20_Text"><text:span text:style-name="T1">(constraint);</text:span></text:span></text:p>
      <text:p text:style-name="P6"><text:span text:style-name="Source_20_Text"><text:span text:style-name="T2"><text:s text:c="8"/></text:span></text:span><text:span text:style-name="Source_20_Text"><text:span text:style-name="T5">case</text:span></text:span><text:span text:style-name="Source_20_Text"><text:span text:style-name="T1"> </text:span></text:span><text:span text:style-name="Source_20_Text"><text:span text:style-name="T8">'budget'</text:span></text:span><text:span text:style-name="Source_20_Text"><text:span text:style-name="T7">:</text:span></text:span></text:p>
      <text:p text:style-name="P6"><text:span text:style-name="Source_20_Text"><text:span text:style-name="T2"><text:s text:c="10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BudgetConstraintCode</text:span></text:span><text:span text:style-name="Source_20_Text"><text:span text:style-name="T1">(constraint);</text:span></text:span></text:p>
      <text:p text:style-name="P6"><text:span text:style-name="Source_20_Text"><text:span text:style-name="T2"><text:s text:c="8"/></text:span></text:span><text:span text:style-name="Source_20_Text"><text:span text:style-name="T5">case</text:span></text:span><text:span text:style-name="Source_20_Text"><text:span text:style-name="T1"> </text:span></text:span><text:span text:style-name="Source_20_Text"><text:span text:style-name="T8">'ergonomics'</text:span></text:span><text:span text:style-name="Source_20_Text"><text:span text:style-name="T7">:</text:span></text:span></text:p>
      <text:p text:style-name="P6"><text:span text:style-name="Source_20_Text"><text:span text:style-name="T2"><text:s text:c="10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ErgonomicsConstraintCode</text:span></text:span><text:span text:style-name="Source_20_Text"><text:span text:style-name="T1">(constraint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typescrip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ompileToTypeScript</text:span></text:span><text:span text:style-name="Source_20_Text"><text:span text:style-name="T1">(code),</text:span></text:span></text:p>
      <text:p text:style-name="P6"><text:span text:style-name="Source_20_Text"><text:span text:style-name="T2"><text:s text:c="6"/></text:span></text:span><text:span text:style-name="Source_20_Text"><text:span text:style-name="T1">js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ompileToJSON</text:span></text:span><text:span text:style-name="Source_20_Text"><text:span text:style-name="T1">(code),</text:span></text:span></text:p>
      <text:p text:style-name="P6"><text:span text:style-name="Source_20_Text"><text:span text:style-name="T2"><text:s text:c="6"/></text:span></text:span><text:span text:style-name="Source_20_Text"><text:span text:style-name="T1">yam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ompileToYAML</text:span></text:span><text:span text:style-name="Source_20_Text"><text:span text:style-name="T1">(code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Système de templates pour partenaire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PartnerTemplateSystem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4">// Templates prédéfinis par secteur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templates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9">'luxury-brands'</text:span></text:span><text:span text:style-name="Source_20_Text"><text:span text:style-name="T7">:</text:span></text:span><text:span text:style-name="Source_20_Text"><text:span text:style-name="T1"> LuxuryBrandTemplate,</text:span></text:span></text:p>
      <text:p text:style-name="P6"><text:span text:style-name="Source_20_Text"><text:span text:style-name="T2"><text:s text:c="4"/></text:span></text:span><text:span text:style-name="Source_20_Text"><text:span text:style-name="T9">'mass-market'</text:span></text:span><text:span text:style-name="Source_20_Text"><text:span text:style-name="T7">:</text:span></text:span><text:span text:style-name="Source_20_Text"><text:span text:style-name="T1"> MassMarketTemplate,</text:span></text:span></text:p>
      <text:p text:style-name="P6"><text:span text:style-name="Source_20_Text"><text:span text:style-name="T2"><text:s text:c="4"/></text:span></text:span><text:span text:style-name="Source_20_Text"><text:span text:style-name="T9">'professional'</text:span></text:span><text:span text:style-name="Source_20_Text"><text:span text:style-name="T7">:</text:span></text:span><text:span text:style-name="Source_20_Text"><text:span text:style-name="T1"> ProfessionalTemplate,</text:span></text:span></text:p>
      <text:p text:style-name="P6"><text:span text:style-name="Source_20_Text"><text:span text:style-name="T2"><text:s text:c="4"/></text:span></text:span><text:span text:style-name="Source_20_Text"><text:span text:style-name="T9">'sustainable'</text:span></text:span><text:span text:style-name="Source_20_Text"><text:span text:style-name="T7">:</text:span></text:span><text:span text:style-name="Source_20_Text"><text:span text:style-name="T1"> SustainableTemplate,</text:span></text:span></text:p>
      <text:p text:style-name="P6"><text:span text:style-name="Source_20_Text"><text:span text:style-name="T2"><text:s text:c="4"/></text:span></text:span><text:span text:style-name="Source_20_Text"><text:span text:style-name="T9">'artisan'</text:span></text:span><text:span text:style-name="Source_20_Text"><text:span text:style-name="T7">:</text:span></text:span><text:span text:style-name="Source_20_Text"><text:span text:style-name="T1"> ArtisanTemplate</text:span></text:span></text:p>
      <text:p text:style-name="P6"><text:span text:style-name="Source_20_Text"><text:span text:style-name="T2"><text:s text:c="2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Création d'un moteur personnalisé sans code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createCustomEngine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1">partnerI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config</text:span></text:span><text:span text:style-name="Source_20_Text"><text:span text:style-name="T7">:</text:span></text:span><text:span text:style-name="Source_20_Text"><text:span text:style-name="T1"> PartnerEngineConfig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CustomEngine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4">// Sélection du template de base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baseTemplate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templates[config.sector </text:span></text:span><text:span text:style-name="Source_20_Text"><text:span text:style-name="T7">||</text:span></text:span><text:span text:style-name="Source_20_Text"><text:span text:style-name="T1"> </text:span></text:span><text:span text:style-name="Source_20_Text"><text:span text:style-name="T8">'mass-market'</text:span></text:span><text:span text:style-name="Source_20_Text"><text:span text:style-name="T1">]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Configuration visuelle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ustomiza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pplyCustomization</text:span></text:span><text:span text:style-name="Source_20_Text"><text:span text:style-name="T1">(baseTemplate, {</text:span></text:span></text:p>
      <text:p text:style-name="P6"><text:span text:style-name="Source_20_Text"><text:span text:style-name="T2"><text:s text:c="6"/></text:span></text:span><text:span text:style-name="Source_20_Text"><text:span text:style-name="T1">branding</text:span></text:span><text:span text:style-name="Source_20_Text"><text:span text:style-name="T7">:</text:span></text:span><text:span text:style-name="Source_20_Text"><text:span text:style-name="T1"> config.branding,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1">catalogs</text:span></text:span><text:span text:style-name="Source_20_Text"><text:span text:style-name="T7">:</text:span></text:span><text:span text:style-name="Source_20_Text"><text:span text:style-name="T1"> config.catalogs,</text:span></text:span></text:p>
      <text:p text:style-name="P6"><text:span text:style-name="Source_20_Text"><text:span text:style-name="T2"><text:s text:c="6"/></text:span></text:span><text:span text:style-name="Source_20_Text"><text:span text:style-name="T1">constraints</text:span></text:span><text:span text:style-name="Source_20_Text"><text:span text:style-name="T7">:</text:span></text:span><text:span text:style-name="Source_20_Text"><text:span text:style-name="T1"> config.constraints,</text:span></text:span></text:p>
      <text:p text:style-name="P6"><text:span text:style-name="Source_20_Text"><text:span text:style-name="T2"><text:s text:c="6"/></text:span></text:span><text:span text:style-name="Source_20_Text"><text:span text:style-name="T1">workflows</text:span></text:span><text:span text:style-name="Source_20_Text"><text:span text:style-name="T7">:</text:span></text:span><text:span text:style-name="Source_20_Text"><text:span text:style-name="T1"> config.workflows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Génération du moteur personnalisé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ustomEngine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Engine</text:span></text:span><text:span text:style-name="Source_20_Text"><text:span text:style-name="T1">(customization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Déploiement automatique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deployment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deployEngine</text:span></text:span><text:span text:style-name="Source_20_Text"><text:span text:style-name="T1">(customEngine, partnerId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engineId</text:span></text:span><text:span text:style-name="Source_20_Text"><text:span text:style-name="T7">:</text:span></text:span><text:span text:style-name="Source_20_Text"><text:span text:style-name="T1"> customEngine.id,</text:span></text:span></text:p>
      <text:p text:style-name="P6"><text:span text:style-name="Source_20_Text"><text:span text:style-name="T2"><text:s text:c="6"/></text:span></text:span><text:span text:style-name="Source_20_Text"><text:span text:style-name="T1">apiEndpoint</text:span></text:span><text:span text:style-name="Source_20_Text"><text:span text:style-name="T7">:</text:span></text:span><text:span text:style-name="Source_20_Text"><text:span text:style-name="T1"> deployment.endpoint,</text:span></text:span></text:p>
      <text:p text:style-name="P6"><text:span text:style-name="Source_20_Text"><text:span text:style-name="T2"><text:s text:c="6"/></text:span></text:span><text:span text:style-name="Source_20_Text"><text:span text:style-name="T1">dashboard</text:span></text:span><text:span text:style-name="Source_20_Text"><text:span text:style-name="T7">:</text:span></text:span><text:span text:style-name="Source_20_Text"><text:span text:style-name="T1"> deployment.dashboardUrl,</text:span></text:span></text:p>
      <text:p text:style-name="P6"><text:span text:style-name="Source_20_Text"><text:span text:style-name="T2"><text:s text:c="6"/></text:span></text:span><text:span text:style-name="Source_20_Text"><text:span text:style-name="T1">documentation</text:span></text:span><text:span text:style-name="Source_20_Text"><text:span text:style-name="T7">:</text:span></text:span><text:span text:style-name="Source_20_Text"><text:span text:style-name="T1"> deployment.docsUrl,</text:span></text:span></text:p>
      <text:p text:style-name="P6"><text:span text:style-name="Source_20_Text"><text:span text:style-name="T2"><text:s text:c="6"/></text:span></text:span><text:span text:style-name="Source_20_Text"><text:span text:style-name="T1">sdk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PartnerSDKs</text:span></text:span><text:span text:style-name="Source_20_Text"><text:span text:style-name="T1">(customEngine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Interface de configuration visuelle pour catalogue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CatalogConfigurationUI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4">// Upload et mapping automatique de catalogues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setupCatalogIntegration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1">partnerI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catalogFiles</text:span></text:span><text:span text:style-name="Source_20_Text"><text:span text:style-name="T7">:</text:span></text:span><text:span text:style-name="Source_20_Text"><text:span text:style-name="T1"> File[]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CatalogIntegration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4">// Analyse automatique des formats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format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nalyzeFormats</text:span></text:span><text:span text:style-name="Source_20_Text"><text:span text:style-name="T1">(catalogFiles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Mapping automatique des champs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fieldMapping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FieldMappings</text:span></text:span><text:span text:style-name="Source_20_Text"><text:span text:style-name="T1">(formats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Interface de correction visuelle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mappingUI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MappingInterface</text:span></text:span><text:span text:style-name="Source_20_Text"><text:span text:style-name="T1">(fieldMappings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Validation des données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validationResult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Catalogs</text:span></text:span><text:span text:style-name="Source_20_Text"><text:span text:style-name="T1">(catalogFiles, fieldMappings);</text:span></text:span></text:p>
      <text:p text:style-name="P6"><text:span text:style-name="Source_20_Text"><text:span text:style-name="T2"><text:s text:c="4"/></text:span></text:span></text:p>
      <text:p text:style-name="P6"><text:soft-page-break/><text:span text:style-name="Source_20_Text"><text:span text:style-name="T2"><text:s text:c="4"/></text:span></text:span><text:span text:style-name="Source_20_Text"><text:span text:style-name="T4">// Prévisualisation des produits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preview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CatalogPreview</text:span></text:span><text:span text:style-name="Source_20_Text"><text:span text:style-name="T1">(catalogFiles, fieldMappings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mappingInterface</text:span></text:span><text:span text:style-name="Source_20_Text"><text:span text:style-name="T7">:</text:span></text:span><text:span text:style-name="Source_20_Text"><text:span text:style-name="T1"> mappingUI,</text:span></text:span></text:p>
      <text:p text:style-name="P6"><text:span text:style-name="Source_20_Text"><text:span text:style-name="T2"><text:s text:c="6"/></text:span></text:span><text:span text:style-name="Source_20_Text"><text:span text:style-name="T1">validationResults,</text:span></text:span></text:p>
      <text:p text:style-name="P6"><text:span text:style-name="Source_20_Text"><text:span text:style-name="T2"><text:s text:c="6"/></text:span></text:span><text:span text:style-name="Source_20_Text"><text:span text:style-name="T1">preview,</text:span></text:span></text:p>
      <text:p text:style-name="P6"><text:span text:style-name="Source_20_Text"><text:span text:style-name="T2"><text:s text:c="6"/></text:span></text:span><text:span text:style-name="Source_20_Text"><text:span text:style-name="T1">suggestedCorrec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Corrections</text:span></text:span><text:span text:style-name="Source_20_Text"><text:span text:style-name="T1">(validationResults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Interface visuelle pour branding</text:span></text:span></text:p>
      <text:p text:style-name="P6"><text:span text:style-name="Source_20_Text"><text:span text:style-name="T2"><text:s text:c="2"/></text:span></text:span><text:span text:style-name="Source_20_Text"><text:span text:style-name="T7">createBrandingInterface</text:span></text:span><text:span text:style-name="Source_20_Text"><text:span text:style-name="T1">(partnerI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BrandingInterface {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4">// Customisation des couleurs</text:span></text:span></text:p>
      <text:p text:style-name="P6"><text:span text:style-name="Source_20_Text"><text:span text:style-name="T2"><text:s text:c="6"/></text:span></text:span><text:span text:style-name="Source_20_Text"><text:span text:style-name="T1">colorPalett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ColorEditor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Upload de logos et assets</text:span></text:span></text:p>
      <text:p text:style-name="P6"><text:span text:style-name="Source_20_Text"><text:span text:style-name="T2"><text:s text:c="6"/></text:span></text:span><text:span text:style-name="Source_20_Text"><text:span text:style-name="T1">assetManager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AssetManager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Configuration des fonts</text:span></text:span></text:p>
      <text:p text:style-name="P6"><text:span text:style-name="Source_20_Text"><text:span text:style-name="T2"><text:s text:c="6"/></text:span></text:span><text:span text:style-name="Source_20_Text"><text:span text:style-name="T1">typographyEditor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TypographyEditor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Templates de mise en page</text:span></text:span></text:p>
      <text:p text:style-name="P6"><text:span text:style-name="Source_20_Text"><text:span text:style-name="T2"><text:s text:c="6"/></text:span></text:span><text:span text:style-name="Source_20_Text"><text:span text:style-name="T1">layoutTemplat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LayoutTemplates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Prévisualisation en temps réel</text:span></text:span></text:p>
      <text:p text:style-name="P6"><text:span text:style-name="Source_20_Text"><text:span text:style-name="T2"><text:s text:c="6"/></text:span></text:span><text:span text:style-name="Source_20_Text"><text:span text:style-name="T1">livePreview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LivePreview</text:span></text:span><text:span text:style-name="Source_20_Text"><text:span text:style-name="T1">(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</text:span></text:span></text:p>
      <text:p text:style-name="Horizontal_20_Line"/>
      <text:h text:style-name="Heading_20_2" text:outline-level="2">✅ Module de Validation Métier Complet</text:h>
      <text:h text:style-name="Heading_20_3" text:outline-level="3">Design Validator - Règles Statiques et IA</text:h>
      <text:p text:style-name="P3">typescript</text:p>
      <text:p text:style-name="P5"><text:span text:style-name="Source_20_Text"><text:span text:style-name="T3">// Système de validation complet avec règles métier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DesignValidator</text:span></text:span><text:span text:style-name="Source_20_Text"><text:span text:style-name="T1"> {</text:span></text:span></text:p>
      <text:p text:style-name="P6"><text:soft-page-break/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staticRules</text:span></text:span><text:span text:style-name="Source_20_Text"><text:span text:style-name="T7">:</text:span></text:span><text:span text:style-name="Source_20_Text"><text:span text:style-name="T1"> StaticRuleEngine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aiValidator</text:span></text:span><text:span text:style-name="Source_20_Text"><text:span text:style-name="T7">:</text:span></text:span><text:span text:style-name="Source_20_Text"><text:span text:style-name="T1"> AIValidationEngine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reportGenerator</text:span></text:span><text:span text:style-name="Source_20_Text"><text:span text:style-name="T7">:</text:span></text:span><text:span text:style-name="Source_20_Text"><text:span text:style-name="T1"> ValidationReportGenerator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Validation complète avec rapport détaillé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validateDesign</text:span></text:span><text:span text:style-name="Source_20_Text"><text:span text:style-name="T1">(design</text:span></text:span><text:span text:style-name="Source_20_Text"><text:span text:style-name="T7">:</text:span></text:span><text:span text:style-name="Source_20_Text"><text:span text:style-name="T1"> KitchenDesign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Validation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validationId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7">uuidv4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startTime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7">performance</text:span></text:span><text:span text:style-name="Source_20_Text"><text:span text:style-name="T1">.</text:span></text:span><text:span text:style-name="Source_20_Text"><text:span text:style-name="T7">now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1. Validation des règles statiques (rapide)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staticValida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StaticRules</text:span></text:span><text:span text:style-name="Source_20_Text"><text:span text:style-name="T1">(design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2. Validation IA (plus lente mais intelligente)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aiValida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WithAI</text:span></text:span><text:span text:style-name="Source_20_Text"><text:span text:style-name="T1">(design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3. Validation croisée (cohérence globale)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rossValida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Coherence</text:span></text:span><text:span text:style-name="Source_20_Text"><text:span text:style-name="T1">(design, staticValidation, aiValidation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4. Génération du rapport complet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report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ValidationReport</text:span></text:span><text:span text:style-name="Source_20_Text"><text:span text:style-name="T1">({</text:span></text:span></text:p>
      <text:p text:style-name="P6"><text:span text:style-name="Source_20_Text"><text:span text:style-name="T2"><text:s text:c="6"/></text:span></text:span><text:span text:style-name="Source_20_Text"><text:span text:style-name="T1">validationId,</text:span></text:span></text:p>
      <text:p text:style-name="P6"><text:span text:style-name="Source_20_Text"><text:span text:style-name="T2"><text:s text:c="6"/></text:span></text:span><text:span text:style-name="Source_20_Text"><text:span text:style-name="T1">design,</text:span></text:span></text:p>
      <text:p text:style-name="P6"><text:span text:style-name="Source_20_Text"><text:span text:style-name="T2"><text:s text:c="6"/></text:span></text:span><text:span text:style-name="Source_20_Text"><text:span text:style-name="T1">staticValidation,</text:span></text:span></text:p>
      <text:p text:style-name="P6"><text:span text:style-name="Source_20_Text"><text:span text:style-name="T2"><text:s text:c="6"/></text:span></text:span><text:span text:style-name="Source_20_Text"><text:span text:style-name="T1">aiValidation,</text:span></text:span></text:p>
      <text:p text:style-name="P6"><text:span text:style-name="Source_20_Text"><text:span text:style-name="T2"><text:s text:c="6"/></text:span></text:span><text:span text:style-name="Source_20_Text"><text:span text:style-name="T1">crossValidation,</text:span></text:span></text:p>
      <text:p text:style-name="P6"><text:span text:style-name="Source_20_Text"><text:span text:style-name="T2"><text:s text:c="6"/></text:span></text:span><text:span text:style-name="Source_20_Text"><text:span text:style-name="T1">validationTim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7">performance</text:span></text:span><text:span text:style-name="Source_20_Text"><text:span text:style-name="T1">.</text:span></text:span><text:span text:style-name="Source_20_Text"><text:span text:style-name="T7">now</text:span></text:span><text:span text:style-name="Source_20_Text"><text:span text:style-name="T1">() </text:span></text:span><text:span text:style-name="Source_20_Text"><text:span text:style-name="T7">-</text:span></text:span><text:span text:style-name="Source_20_Text"><text:span text:style-name="T1"> startTime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isVali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alculateOverallValidity</text:span></text:span><text:span text:style-name="Source_20_Text"><text:span text:style-name="T1">(staticValidation, aiValidation, crossValidation),</text:span></text:span></text:p>
      <text:p text:style-name="P6"><text:span text:style-name="Source_20_Text"><text:span text:style-name="T2"><text:s text:c="6"/></text:span></text:span><text:span text:style-name="Source_20_Text"><text:span text:style-name="T1">scor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alculateValidationScore</text:span></text:span><text:span text:style-name="Source_20_Text"><text:span text:style-name="T1">(staticValidation, aiValidation, crossValidation),</text:span></text:span></text:p>
      <text:p text:style-name="P6"><text:span text:style-name="Source_20_Text"><text:span text:style-name="T2"><text:s text:c="6"/></text:span></text:span><text:span text:style-name="Source_20_Text"><text:span text:style-name="T1">staticValidation,</text:span></text:span></text:p>
      <text:p text:style-name="P6"><text:span text:style-name="Source_20_Text"><text:span text:style-name="T2"><text:s text:c="6"/></text:span></text:span><text:span text:style-name="Source_20_Text"><text:span text:style-name="T1">aiValidation,</text:span></text:span></text:p>
      <text:p text:style-name="P6"><text:span text:style-name="Source_20_Text"><text:span text:style-name="T2"><text:s text:c="6"/></text:span></text:span><text:span text:style-name="Source_20_Text"><text:span text:style-name="T1">crossValidation,</text:span></text:span></text:p>
      <text:p text:style-name="P6"><text:span text:style-name="Source_20_Text"><text:span text:style-name="T2"><text:s text:c="6"/></text:span></text:span><text:span text:style-name="Source_20_Text"><text:span text:style-name="T1">report,</text:span></text:span></text:p>
      <text:p text:style-name="P6"><text:span text:style-name="Source_20_Text"><text:span text:style-name="T2"><text:s text:c="6"/></text:span></text:span><text:span text:style-name="Source_20_Text"><text:span text:style-name="T1">autoCorrec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AutoCorrections</text:span></text:span><text:span text:style-name="Source_20_Text"><text:span text:style-name="T1">(design, staticValidation, aiValidation),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1">certificationProof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CertificationProof</text:span></text:span><text:span text:style-name="Source_20_Text"><text:span text:style-name="T1">(report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Règles statiques (non-négociables)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validateStaticRules</text:span></text:span><text:span text:style-name="Source_20_Text"><text:span text:style-name="T1">(design</text:span></text:span><text:span text:style-name="Source_20_Text"><text:span text:style-name="T7">:</text:span></text:span><text:span text:style-name="Source_20_Text"><text:span text:style-name="T1"> KitchenDesign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StaticValidation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rules </text:span></text:span><text:span text:style-name="Source_20_Text"><text:span text:style-name="T7">=</text:span></text:span><text:span text:style-name="Source_20_Text"><text:span text:style-name="T1"> [</text:span></text:span></text:p>
      <text:p text:style-name="P6"><text:span text:style-name="Source_20_Text"><text:span text:style-name="T2"><text:s text:c="6"/></text:span></text:span><text:span text:style-name="Source_20_Text"><text:span text:style-name="T4">// Règles de sécurité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SafetyRule</text:span></text:span><text:span text:style-name="Source_20_Text"><text:span text:style-name="T1">(</text:span></text:span><text:span text:style-name="Source_20_Text"><text:span text:style-name="T8">'minimum_aisle_width'</text:span></text:span><text:span text:style-name="Source_20_Text"><text:span text:style-name="T1">, </text:span></text:span><text:span text:style-name="Source_20_Text"><text:span text:style-name="T8">'Largeur de passage minimale 90cm'</text:span></text:span><text:span text:style-name="Source_20_Text"><text:span text:style-name="T1">, 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design.aisles.</text:span></text:span><text:span text:style-name="Source_20_Text"><text:span text:style-name="T7">every</text:span></text:span><text:span text:style-name="Source_20_Text"><text:span text:style-name="T1">(aisle </text:span></text:span><text:span text:style-name="Source_20_Text"><text:span text:style-name="T7">=&gt;</text:span></text:span><text:span text:style-name="Source_20_Text"><text:span text:style-name="T1"> aisle.width </text:span></text:span><text:span text:style-name="Source_20_Text"><text:span text:style-name="T7">&gt;=</text:span></text:span><text:span text:style-name="Source_20_Text"><text:span text:style-name="T1"> </text:span></text:span><text:span text:style-name="Source_20_Text"><text:span text:style-name="T6">90</text:span></text:span><text:span text:style-name="Source_20_Text"><text:span text:style-name="T1">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SafetyRule</text:span></text:span><text:span text:style-name="Source_20_Text"><text:span text:style-name="T1">(</text:span></text:span><text:span text:style-name="Source_20_Text"><text:span text:style-name="T8">'appliance_clearance'</text:span></text:span><text:span text:style-name="Source_20_Text"><text:span text:style-name="T1">, </text:span></text:span><text:span text:style-name="Source_20_Text"><text:span text:style-name="T8">'Dégagement appareil minimum 60cm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ApplianceClearances</text:span></text:span><text:span text:style-name="Source_20_Text"><text:span text:style-name="T1">(design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SafetyRule</text:span></text:span><text:span text:style-name="Source_20_Text"><text:span text:style-name="T1">(</text:span></text:span><text:span text:style-name="Source_20_Text"><text:span text:style-name="T8">'electrical_safety'</text:span></text:span><text:span text:style-name="Source_20_Text"><text:span text:style-name="T1">, </text:span></text:span><text:span text:style-name="Source_20_Text"><text:span text:style-name="T8">'Prises électriques conformes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ElectricalSafety</text:span></text:span><text:span text:style-name="Source_20_Text"><text:span text:style-name="T1">(design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Règles ergonomiques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ErgonomicRule</text:span></text:span><text:span text:style-name="Source_20_Text"><text:span text:style-name="T1">(</text:span></text:span><text:span text:style-name="Source_20_Text"><text:span text:style-name="T8">'work_triangle'</text:span></text:span><text:span text:style-name="Source_20_Text"><text:span text:style-name="T1">, </text:span></text:span><text:span text:style-name="Source_20_Text"><text:span text:style-name="T8">'Triangle de travail optimisé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WorkTriangle</text:span></text:span><text:span text:style-name="Source_20_Text"><text:span text:style-name="T1">(design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ErgonomicRule</text:span></text:span><text:span text:style-name="Source_20_Text"><text:span text:style-name="T1">(</text:span></text:span><text:span text:style-name="Source_20_Text"><text:span text:style-name="T8">'counter_height'</text:span></text:span><text:span text:style-name="Source_20_Text"><text:span text:style-name="T1">, </text:span></text:span><text:span text:style-name="Source_20_Text"><text:span text:style-name="T8">'Hauteur plan de travail ergonomique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CounterHeights</text:span></text:span><text:span text:style-name="Source_20_Text"><text:span text:style-name="T1">(design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Règles techniques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TechnicalRule</text:span></text:span><text:span text:style-name="Source_20_Text"><text:span text:style-name="T1">(</text:span></text:span><text:span text:style-name="Source_20_Text"><text:span text:style-name="T8">'structural_integrity'</text:span></text:span><text:span text:style-name="Source_20_Text"><text:span text:style-name="T1">, </text:span></text:span><text:span text:style-name="Source_20_Text"><text:span text:style-name="T8">'Intégrité structurelle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StructuralIntegrity</text:span></text:span><text:span text:style-name="Source_20_Text"><text:span text:style-name="T1">(design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TechnicalRule</text:span></text:span><text:span text:style-name="Source_20_Text"><text:span text:style-name="T1">(</text:span></text:span><text:span text:style-name="Source_20_Text"><text:span text:style-name="T8">'ventilation_compliance'</text:span></text:span><text:span text:style-name="Source_20_Text"><text:span text:style-name="T1">, </text:span></text:span><text:span text:style-name="Source_20_Text"><text:span text:style-name="T8">'Ventilation conforme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Ventilation</text:span></text:span><text:span text:style-name="Source_20_Text"><text:span text:style-name="T1">(design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Règles réglementaires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RegulatoryRule</text:span></text:span><text:span text:style-name="Source_20_Text"><text:span text:style-name="T1">(</text:span></text:span><text:span text:style-name="Source_20_Text"><text:span text:style-name="T8">'building_codes'</text:span></text:span><text:span text:style-name="Source_20_Text"><text:span text:style-name="T1">, </text:span></text:span><text:span text:style-name="Source_20_Text"><text:span text:style-name="T8">'Conformité codes du bâtiment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BuildingCodes</text:span></text:span><text:span text:style-name="Source_20_Text"><text:span text:style-name="T1">(design)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RegulatoryRule</text:span></text:span><text:span text:style-name="Source_20_Text"><text:span text:style-name="T1">(</text:span></text:span><text:span text:style-name="Source_20_Text"><text:span text:style-name="T8">'accessibility'</text:span></text:span><text:span text:style-name="Source_20_Text"><text:span text:style-name="T1">, </text:span></text:span><text:span text:style-name="Source_20_Text"><text:span text:style-name="T8">'Accessibilité PMR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ign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eAccessibility</text:span></text:span><text:span text:style-name="Source_20_Text"><text:span text:style-name="T1">(design))</text:span></text:span></text:p>
      <text:p text:style-name="P6"><text:span text:style-name="Source_20_Text"><text:span text:style-name="T2"><text:s text:c="4"/></text:span></text:span><text:span text:style-name="Source_20_Text"><text:span text:style-name="T1">];</text:span></text:span></text:p>
      <text:p text:style-name="P6"><text:span text:style-name="Source_20_Text"><text:span text:style-name="T2"><text:s text:c="4"/></text:span></text:span></text:p>
      <text:p text:style-name="P6"><text:soft-page-break/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result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1">.</text:span></text:span><text:span text:style-name="Source_20_Text"><text:span text:style-name="T7">all</text:span></text:span><text:span text:style-name="Source_20_Text"><text:span text:style-name="T1">(</text:span></text:span></text:p>
      <text:p text:style-name="P6"><text:span text:style-name="Source_20_Text"><text:span text:style-name="T2"><text:s text:c="6"/></text:span></text:span><text:span text:style-name="Source_20_Text"><text:span text:style-name="T1">rules.</text:span></text:span><text:span text:style-name="Source_20_Text"><text:span text:style-name="T7">map</text:span></text:span><text:span text:style-name="Source_20_Text"><text:span text:style-name="T1">(rule </text:span></text:span><text:span text:style-name="Source_20_Text"><text:span text:style-name="T7">=&gt;</text:span></text:span><text:span text:style-name="Source_20_Text"><text:span text:style-name="T1"> rule.</text:span></text:span><text:span text:style-name="Source_20_Text"><text:span text:style-name="T7">validate</text:span></text:span><text:span text:style-name="Source_20_Text"><text:span text:style-name="T1">(design))</text:span></text:span></text:p>
      <text:p text:style-name="P6"><text:span text:style-name="Source_20_Text"><text:span text:style-name="T2"><text:s text:c="4"/></text:span></text:span><text:span text:style-name="Source_20_Text"><text:span text:style-name="T1">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passedRules</text:span></text:span><text:span text:style-name="Source_20_Text"><text:span text:style-name="T7">:</text:span></text:span><text:span text:style-name="Source_20_Text"><text:span text:style-name="T1"> results.</text:span></text:span><text:span text:style-name="Source_20_Text"><text:span text:style-name="T7">filter</text:span></text:span><text:span text:style-name="Source_20_Text"><text:span text:style-name="T1">(r </text:span></text:span><text:span text:style-name="Source_20_Text"><text:span text:style-name="T7">=&gt;</text:span></text:span><text:span text:style-name="Source_20_Text"><text:span text:style-name="T1"> r.passed),</text:span></text:span></text:p>
      <text:p text:style-name="P6"><text:span text:style-name="Source_20_Text"><text:span text:style-name="T2"><text:s text:c="6"/></text:span></text:span><text:span text:style-name="Source_20_Text"><text:span text:style-name="T1">failedRules</text:span></text:span><text:span text:style-name="Source_20_Text"><text:span text:style-name="T7">:</text:span></text:span><text:span text:style-name="Source_20_Text"><text:span text:style-name="T1"> results.</text:span></text:span><text:span text:style-name="Source_20_Text"><text:span text:style-name="T7">filter</text:span></text:span><text:span text:style-name="Source_20_Text"><text:span text:style-name="T1">(r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7">!</text:span></text:span><text:span text:style-name="Source_20_Text"><text:span text:style-name="T1">r.passed),</text:span></text:span></text:p>
      <text:p text:style-name="P6"><text:span text:style-name="Source_20_Text"><text:span text:style-name="T2"><text:s text:c="6"/></text:span></text:span><text:span text:style-name="Source_20_Text"><text:span text:style-name="T1">criticalFailures</text:span></text:span><text:span text:style-name="Source_20_Text"><text:span text:style-name="T7">:</text:span></text:span><text:span text:style-name="Source_20_Text"><text:span text:style-name="T1"> results.</text:span></text:span><text:span text:style-name="Source_20_Text"><text:span text:style-name="T7">filter</text:span></text:span><text:span text:style-name="Source_20_Text"><text:span text:style-name="T1">(r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7">!</text:span></text:span><text:span text:style-name="Source_20_Text"><text:span text:style-name="T1">r.passed </text:span></text:span><text:span text:style-name="Source_20_Text"><text:span text:style-name="T7">&amp;&amp;</text:span></text:span><text:span text:style-name="Source_20_Text"><text:span text:style-name="T1"> r.critical),</text:span></text:span></text:p>
      <text:p text:style-name="P6"><text:span text:style-name="Source_20_Text"><text:span text:style-name="T2"><text:s text:c="6"/></text:span></text:span><text:span text:style-name="Source_20_Text"><text:span text:style-name="T1">warnings</text:span></text:span><text:span text:style-name="Source_20_Text"><text:span text:style-name="T7">:</text:span></text:span><text:span text:style-name="Source_20_Text"><text:span text:style-name="T1"> results.</text:span></text:span><text:span text:style-name="Source_20_Text"><text:span text:style-name="T7">filter</text:span></text:span><text:span text:style-name="Source_20_Text"><text:span text:style-name="T1">(r </text:span></text:span><text:span text:style-name="Source_20_Text"><text:span text:style-name="T7">=&gt;</text:span></text:span><text:span text:style-name="Source_20_Text"><text:span text:style-name="T1"> r.passed </text:span></text:span><text:span text:style-name="Source_20_Text"><text:span text:style-name="T7">&amp;&amp;</text:span></text:span><text:span text:style-name="Source_20_Text"><text:span text:style-name="T1"> r.warnings.length 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),</text:span></text:span></text:p>
      <text:p text:style-name="P6"><text:span text:style-name="Source_20_Text"><text:span text:style-name="T2"><text:s text:c="6"/></text:span></text:span><text:span text:style-name="Source_20_Text"><text:span text:style-name="T1">overallCompliance</text:span></text:span><text:span text:style-name="Source_20_Text"><text:span text:style-name="T7">:</text:span></text:span><text:span text:style-name="Source_20_Text"><text:span text:style-name="T1"> results.</text:span></text:span><text:span text:style-name="Source_20_Text"><text:span text:style-name="T7">filter</text:span></text:span><text:span text:style-name="Source_20_Text"><text:span text:style-name="T1">(r </text:span></text:span><text:span text:style-name="Source_20_Text"><text:span text:style-name="T7">=&gt;</text:span></text:span><text:span text:style-name="Source_20_Text"><text:span text:style-name="T1"> r.passed).length </text:span></text:span><text:span text:style-name="Source_20_Text"><text:span text:style-name="T7">/</text:span></text:span><text:span text:style-name="Source_20_Text"><text:span text:style-name="T1"> results.length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Validation IA (intelligente et adaptative)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validateWithAI</text:span></text:span><text:span text:style-name="Source_20_Text"><text:span text:style-name="T1">(design</text:span></text:span><text:span text:style-name="Source_20_Text"><text:span text:style-name="T7">:</text:span></text:span><text:span text:style-name="Source_20_Text"><text:span text:style-name="T1"> KitchenDesign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AIValidation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validators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4">// Score ergonomique IA</text:span></text:span></text:p>
      <text:p text:style-name="P6"><text:span text:style-name="Source_20_Text"><text:span text:style-name="T2"><text:s text:c="6"/></text:span></text:span><text:span text:style-name="Source_20_Text"><text:span text:style-name="T1">ergonomic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iValidator.</text:span></text:span><text:span text:style-name="Source_20_Text"><text:span text:style-name="T7">validateErgonomics</text:span></text:span><text:span text:style-name="Source_20_Text"><text:span text:style-name="T1">(design, {</text:span></text:span></text:p>
      <text:p text:style-name="P6"><text:span text:style-name="Source_20_Text"><text:span text:style-name="T2"><text:s text:c="8"/></text:span></text:span><text:span text:style-name="Source_20_Text"><text:span text:style-name="T1">minimumScor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8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targetProfiles</text:span></text:span><text:span text:style-name="Source_20_Text"><text:span text:style-name="T7">:</text:span></text:span><text:span text:style-name="Source_20_Text"><text:span text:style-name="T1"> design.userProfiles</text:span></text:span></text:p>
      <text:p text:style-name="P6"><text:span text:style-name="Source_20_Text"><text:span text:style-name="T2"><text:s text:c="6"/></text:span></text:span><text:span text:style-name="Source_20_Text"><text:span text:style-name="T1">}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Efficacité du workflow</text:span></text:span></text:p>
      <text:p text:style-name="P6"><text:span text:style-name="Source_20_Text"><text:span text:style-name="T2"><text:s text:c="6"/></text:span></text:span><text:span text:style-name="Source_20_Text"><text:span text:style-name="T1">workflow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iValidator.</text:span></text:span><text:span text:style-name="Source_20_Text"><text:span text:style-name="T7">validateWorkflow</text:span></text:span><text:span text:style-name="Source_20_Text"><text:span text:style-name="T1">(design, {</text:span></text:span></text:p>
      <text:p text:style-name="P6"><text:span text:style-name="Source_20_Text"><text:span text:style-name="T2"><text:s text:c="8"/></text:span></text:span><text:span text:style-name="Source_20_Text"><text:span text:style-name="T1">minimumEfficienc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75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cookingStyles</text:span></text:span><text:span text:style-name="Source_20_Text"><text:span text:style-name="T7">:</text:span></text:span><text:span text:style-name="Source_20_Text"><text:span text:style-name="T1"> design.cookingStyles</text:span></text:span></text:p>
      <text:p text:style-name="P6"><text:span text:style-name="Source_20_Text"><text:span text:style-name="T2"><text:s text:c="6"/></text:span></text:span><text:span text:style-name="Source_20_Text"><text:span text:style-name="T1">}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Cohérence esthétique</text:span></text:span></text:p>
      <text:p text:style-name="P6"><text:span text:style-name="Source_20_Text"><text:span text:style-name="T2"><text:s text:c="6"/></text:span></text:span><text:span text:style-name="Source_20_Text"><text:span text:style-name="T1">aesthetic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iValidator.</text:span></text:span><text:span text:style-name="Source_20_Text"><text:span text:style-name="T7">validateAesthetics</text:span></text:span><text:span text:style-name="Source_20_Text"><text:span text:style-name="T1">(design, {</text:span></text:span></text:p>
      <text:p text:style-name="P6"><text:span text:style-name="Source_20_Text"><text:span text:style-name="T2"><text:s text:c="8"/></text:span></text:span><text:span text:style-name="Source_20_Text"><text:span text:style-name="T1">styleConsistenc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85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colorHarmon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8</text:span></text:span></text:p>
      <text:p text:style-name="P6"><text:span text:style-name="Source_20_Text"><text:span text:style-name="T2"><text:s text:c="6"/></text:span></text:span><text:span text:style-name="Source_20_Text"><text:span text:style-name="T1">}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Optimisation de l'espace</text:span></text:span></text:p>
      <text:p text:style-name="P6"><text:span text:style-name="Source_20_Text"><text:span text:style-name="T2"><text:s text:c="6"/></text:span></text:span><text:span text:style-name="Source_20_Text"><text:span text:style-name="T1">spaceOptimiz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iValidator.</text:span></text:span><text:span text:style-name="Source_20_Text"><text:span text:style-name="T7">validateSpaceUsage</text:span></text:span><text:span text:style-name="Source_20_Text"><text:span text:style-name="T1">(design, {</text:span></text:span></text:p>
      <text:p text:style-name="P6"><text:span text:style-name="Source_20_Text"><text:span text:style-name="T2"><text:s text:c="8"/></text:span></text:span><text:span text:style-name="Source_20_Text"><text:span text:style-name="T1">utilizationThreshol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8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storageEfficienc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75</text:span></text:span></text:p>
      <text:p text:style-name="P6"><text:span text:style-name="Source_20_Text"><text:span text:style-name="T2"><text:s text:c="6"/></text:span></text:span><text:span text:style-name="Source_20_Text"><text:span text:style-name="T1">}),</text:span></text:span></text:p>
      <text:p text:style-name="P6"><text:span text:style-name="Source_20_Text"><text:span text:style-name="T2"><text:s text:c="6"/>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4">// Durabilité</text:span></text:span></text:p>
      <text:p text:style-name="P6"><text:span text:style-name="Source_20_Text"><text:span text:style-name="T2"><text:s text:c="6"/></text:span></text:span><text:span text:style-name="Source_20_Text"><text:span text:style-name="T1">sustainabilit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iValidator.</text:span></text:span><text:span text:style-name="Source_20_Text"><text:span text:style-name="T7">validateSustainability</text:span></text:span><text:span text:style-name="Source_20_Text"><text:span text:style-name="T1">(design, {</text:span></text:span></text:p>
      <text:p text:style-name="P6"><text:span text:style-name="Source_20_Text"><text:span text:style-name="T2"><text:s text:c="8"/></text:span></text:span><text:span text:style-name="Source_20_Text"><text:span text:style-name="T1">carbonFootprintMax</text:span></text:span><text:span text:style-name="Source_20_Text"><text:span text:style-name="T7">:</text:span></text:span><text:span text:style-name="Source_20_Text"><text:span text:style-name="T1"> design.sustainabilityGoals</text:span></text:span><text:span text:style-name="Source_20_Text"><text:span text:style-name="T7">?.</text:span></text:span><text:span text:style-name="Source_20_Text"><text:span text:style-name="T1">carbonLimit,</text:span></text:span></text:p>
      <text:p text:style-name="P6"><text:span text:style-name="Source_20_Text"><text:span text:style-name="T2"><text:s text:c="8"/></text:span></text:span><text:span text:style-name="Source_20_Text"><text:span text:style-name="T1">recyclabilityMi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7</text:span></text:span></text:p>
      <text:p text:style-name="P6"><text:span text:style-name="Source_20_Text"><text:span text:style-name="T2"><text:s text:c="6"/></text:span></text:span><text:span text:style-name="Source_20_Text"><text:span text:style-name="T1">}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Innovation et fonctionnalité</text:span></text:span></text:p>
      <text:p text:style-name="P6"><text:span text:style-name="Source_20_Text"><text:span text:style-name="T2"><text:s text:c="6"/></text:span></text:span><text:span text:style-name="Source_20_Text"><text:span text:style-name="T1">innov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iValidator.</text:span></text:span><text:span text:style-name="Source_20_Text"><text:span text:style-name="T7">validateInnovation</text:span></text:span><text:span text:style-name="Source_20_Text"><text:span text:style-name="T1">(design, {</text:span></text:span></text:p>
      <text:p text:style-name="P6"><text:span text:style-name="Source_20_Text"><text:span text:style-name="T2"><text:s text:c="8"/></text:span></text:span><text:span text:style-name="Source_20_Text"><text:span text:style-name="T1">technologyIntegr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6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futureProofing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7</text:span></text:span></text:p>
      <text:p text:style-name="P6"><text:span text:style-name="Source_20_Text"><text:span text:style-name="T2"><text:s text:c="6"/></text:span></text:span><text:span text:style-name="Source_20_Text"><text:span text:style-name="T1">}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scores</text:span></text:span><text:span text:style-name="Source_20_Text"><text:span text:style-name="T7">:</text:span></text:span><text:span text:style-name="Source_20_Text"><text:span text:style-name="T1"> validators,</text:span></text:span></text:p>
      <text:p text:style-name="P6"><text:span text:style-name="Source_20_Text"><text:span text:style-name="T2"><text:s text:c="6"/></text:span></text:span><text:span text:style-name="Source_20_Text"><text:span text:style-name="T1">overallAIScor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alculateOverallAIScore</text:span></text:span><text:span text:style-name="Source_20_Text"><text:span text:style-name="T1">(validators),</text:span></text:span></text:p>
      <text:p text:style-name="P6"><text:span text:style-name="Source_20_Text"><text:span text:style-name="T2"><text:s text:c="6"/></text:span></text:span><text:span text:style-name="Source_20_Text"><text:span text:style-name="T1">recommenda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AIRecommendations</text:span></text:span><text:span text:style-name="Source_20_Text"><text:span text:style-name="T1">(validators),</text:span></text:span></text:p>
      <text:p text:style-name="P6"><text:span text:style-name="Source_20_Text"><text:span text:style-name="T2"><text:s text:c="6"/></text:span></text:span><text:span text:style-name="Source_20_Text"><text:span text:style-name="T1">confidenceLeve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alculateConfidenceLevel</text:span></text:span><text:span text:style-name="Source_20_Text"><text:span text:style-name="T1">(validators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Génération de corrections automatiques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nerateAutoCorrections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1">design</text:span></text:span><text:span text:style-name="Source_20_Text"><text:span text:style-name="T7">:</text:span></text:span><text:span text:style-name="Source_20_Text"><text:span text:style-name="T1"> KitchenDesign,</text:span></text:span></text:p>
      <text:p text:style-name="P6"><text:span text:style-name="Source_20_Text"><text:span text:style-name="T2"><text:s text:c="4"/></text:span></text:span><text:span text:style-name="Source_20_Text"><text:span text:style-name="T1">staticValidation</text:span></text:span><text:span text:style-name="Source_20_Text"><text:span text:style-name="T7">:</text:span></text:span><text:span text:style-name="Source_20_Text"><text:span text:style-name="T1"> StaticValidationResult,</text:span></text:span></text:p>
      <text:p text:style-name="P6"><text:span text:style-name="Source_20_Text"><text:span text:style-name="T2"><text:s text:c="4"/></text:span></text:span><text:span text:style-name="Source_20_Text"><text:span text:style-name="T1">aiValidation</text:span></text:span><text:span text:style-name="Source_20_Text"><text:span text:style-name="T7">:</text:span></text:span><text:span text:style-name="Source_20_Text"><text:span text:style-name="T1"> AIValidationResult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AutoCorrection[]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orrections</text:span></text:span><text:span text:style-name="Source_20_Text"><text:span text:style-name="T7">:</text:span></text:span><text:span text:style-name="Source_20_Text"><text:span text:style-name="T1"> AutoCorrection[] </text:span></text:span><text:span text:style-name="Source_20_Text"><text:span text:style-name="T7">=</text:span></text:span><text:span text:style-name="Source_20_Text"><text:span text:style-name="T1"> []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Corrections pour règles statiques</text:span></text:span></text:p>
      <text:p text:style-name="P6"><text:span text:style-name="Source_20_Text"><text:span text:style-name="T2"><text:s text:c="4"/></text:span></text:span><text:span text:style-name="Source_20_Text"><text:span text:style-name="T5">for</text:span></text:span><text:span text:style-name="Source_20_Text"><text:span text:style-name="T1"> (</text:span></text:span><text:span text:style-name="Source_20_Text"><text:span text:style-name="T5">const</text:span></text:span><text:span text:style-name="Source_20_Text"><text:span text:style-name="T1"> failedRule </text:span></text:span><text:span text:style-name="Source_20_Text"><text:span text:style-name="T5">of</text:span></text:span><text:span text:style-name="Source_20_Text"><text:span text:style-name="T1"> staticValidation.failedRules) {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correc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StaticCorrection</text:span></text:span><text:span text:style-name="Source_20_Text"><text:span text:style-name="T1">(design, failedRule);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correction.canAutoApply) {</text:span></text:span></text:p>
      <text:p text:style-name="P6"><text:span text:style-name="Source_20_Text"><text:span text:style-name="T2"><text:s text:c="8"/></text:span></text:span><text:span text:style-name="Source_20_Text"><text:span text:style-name="T1">corrections.</text:span></text:span><text:span text:style-name="Source_20_Text"><text:span text:style-name="T7">push</text:span></text:span><text:span text:style-name="Source_20_Text"><text:span text:style-name="T1">(correction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Corrections IA pour optimisation</text:span></text:span></text:p>
      <text:p text:style-name="P6"><text:span text:style-name="Source_20_Text"><text:span text:style-name="T2"><text:s text:c="4"/></text:span></text:span><text:span text:style-name="Source_20_Text"><text:span text:style-name="T5">for</text:span></text:span><text:span text:style-name="Source_20_Text"><text:span text:style-name="T1"> (</text:span></text:span><text:span text:style-name="Source_20_Text"><text:span text:style-name="T5">const</text:span></text:span><text:span text:style-name="Source_20_Text"><text:span text:style-name="T1"> [category, score] </text:span></text:span><text:span text:style-name="Source_20_Text"><text:span text:style-name="T5">of</text:span></text:span><text:span text:style-name="Source_20_Text"><text:span text:style-name="T1"> </text:span></text:span><text:span text:style-name="Source_20_Text"><text:span text:style-name="T6">Object</text:span></text:span><text:span text:style-name="Source_20_Text"><text:span text:style-name="T1">.</text:span></text:span><text:span text:style-name="Source_20_Text"><text:span text:style-name="T7">entries</text:span></text:span><text:span text:style-name="Source_20_Text"><text:span text:style-name="T1">(aiValidation.scores)) {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score.score </text:span></text:span><text:span text:style-name="Source_20_Text"><text:span text:style-name="T7">&lt;</text:span></text:span><text:span text:style-name="Source_20_Text"><text:span text:style-name="T1"> score.threshold) {</text:span></text:span></text:p>
      <text:p text:style-name="P6"><text:soft-page-break/><text:span text:style-name="Source_20_Text"><text:span text:style-name="T2"><text:s text:c="8"/></text:span></text:span><text:span text:style-name="Source_20_Text"><text:span text:style-name="T5">const</text:span></text:span><text:span text:style-name="Source_20_Text"><text:span text:style-name="T1"> correc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AICorrection</text:span></text:span><text:span text:style-name="Source_20_Text"><text:span text:style-name="T1">(design, category, score);</text:span></text:span></text:p>
      <text:p text:style-name="P6"><text:span text:style-name="Source_20_Text"><text:span text:style-name="T2"><text:s text:c="8"/></text:span></text:span><text:span text:style-name="Source_20_Text"><text:span text:style-name="T5">if</text:span></text:span><text:span text:style-name="Source_20_Text"><text:span text:style-name="T1"> (correction.canAutoApply) {</text:span></text:span></text:p>
      <text:p text:style-name="P6"><text:span text:style-name="Source_20_Text"><text:span text:style-name="T2"><text:s text:c="10"/></text:span></text:span><text:span text:style-name="Source_20_Text"><text:span text:style-name="T1">corrections.</text:span></text:span><text:span text:style-name="Source_20_Text"><text:span text:style-name="T7">push</text:span></text:span><text:span text:style-name="Source_20_Text"><text:span text:style-name="T1">(correction);</text:span></text:span></text:p>
      <text:p text:style-name="P6"><text:span text:style-name="Source_20_Text"><text:span text:style-name="T2"><text:s text:c="8"/></text:span></text:span><text:span text:style-name="Source_20_Text"><text:span text:style-name="T1">}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corrections.</text:span></text:span><text:span text:style-name="Source_20_Text"><text:span text:style-name="T7">sort</text:span></text:span><text:span text:style-name="Source_20_Text"><text:span text:style-name="T1">((a, b) </text:span></text:span><text:span text:style-name="Source_20_Text"><text:span text:style-name="T7">=&gt;</text:span></text:span><text:span text:style-name="Source_20_Text"><text:span text:style-name="T1"> b.impact </text:span></text:span><text:span text:style-name="Source_20_Text"><text:span text:style-name="T7">-</text:span></text:span><text:span text:style-name="Source_20_Text"><text:span text:style-name="T1"> a.impact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Génération de preuve de certification automatique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nerateCertificationProof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1">report</text:span></text:span><text:span text:style-name="Source_20_Text"><text:span text:style-name="T7">:</text:span></text:span><text:span text:style-name="Source_20_Text"><text:span text:style-name="T1"> ValidationReport</text:span></text:span></text:p>
      <text:p text:style-name="P6"><text:span text:style-name="Source_20_Text"><text:span text:style-name="T2"><text:s text:c="2"/>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CertificationProof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ertification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i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7">uuidv4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1">designId</text:span></text:span><text:span text:style-name="Source_20_Text"><text:span text:style-name="T7">:</text:span></text:span><text:span text:style-name="Source_20_Text"><text:span text:style-name="T1"> report.designId,</text:span></text:span></text:p>
      <text:p text:style-name="P6"><text:span text:style-name="Source_20_Text"><text:span text:style-name="T2"><text:s text:c="6"/></text:span></text:span><text:span text:style-name="Source_20_Text"><text:span text:style-name="T1">timestamp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Date</text:span></text:span><text:span text:style-name="Source_20_Text"><text:span text:style-name="T1">().</text:span></text:span><text:span text:style-name="Source_20_Text"><text:span text:style-name="T7">toISOString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1">validator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KitchenXpert Validation Engine v4.1.0'</text:span></text:span><text:span text:style-name="Source_20_Text"><text:span text:style-name="T1">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Conformité réglementaire</text:span></text:span></text:p>
      <text:p text:style-name="P6"><text:span text:style-name="Source_20_Text"><text:span text:style-name="T2"><text:s text:c="6"/></text:span></text:span><text:span text:style-name="Source_20_Text"><text:span text:style-name="T1">regulatory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buildingCodes</text:span></text:span><text:span text:style-name="Source_20_Text"><text:span text:style-name="T7">:</text:span></text:span><text:span text:style-name="Source_20_Text"><text:span text:style-name="T1"> report.staticValidation.overallCompliance </text:span></text:span><text:span text:style-name="Source_20_Text"><text:span text:style-name="T7">&gt;=</text:span></text:span><text:span text:style-name="Source_20_Text"><text:span text:style-name="T1"> </text:span></text:span><text:span text:style-name="Source_20_Text"><text:span text:style-name="T6">1.0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safetyStandards</text:span></text:span><text:span text:style-name="Source_20_Text"><text:span text:style-name="T7">:</text:span></text:span><text:span text:style-name="Source_20_Text"><text:span text:style-name="T1"> report.staticValidation.criticalFailures.length </text:span></text:span><text:span text:style-name="Source_20_Text"><text:span text:style-name="T7">===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accessibilityComplianc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AccessibilityCompliance</text:span></text:span><text:span text:style-name="Source_20_Text"><text:span text:style-name="T1">(report)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Scores de qualité</text:span></text:span></text:p>
      <text:p text:style-name="P6"><text:span text:style-name="Source_20_Text"><text:span text:style-name="T2"><text:s text:c="6"/></text:span></text:span><text:span text:style-name="Source_20_Text"><text:span text:style-name="T1">quality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ergonomicScore</text:span></text:span><text:span text:style-name="Source_20_Text"><text:span text:style-name="T7">:</text:span></text:span><text:span text:style-name="Source_20_Text"><text:span text:style-name="T1"> report.aiValidation.scores.ergonomics.score,</text:span></text:span></text:p>
      <text:p text:style-name="P6"><text:span text:style-name="Source_20_Text"><text:span text:style-name="T2"><text:s text:c="8"/></text:span></text:span><text:span text:style-name="Source_20_Text"><text:span text:style-name="T1">workflowEfficiency</text:span></text:span><text:span text:style-name="Source_20_Text"><text:span text:style-name="T7">:</text:span></text:span><text:span text:style-name="Source_20_Text"><text:span text:style-name="T1"> report.aiValidation.scores.workflow.score,</text:span></text:span></text:p>
      <text:p text:style-name="P6"><text:span text:style-name="Source_20_Text"><text:span text:style-name="T2"><text:s text:c="8"/></text:span></text:span><text:span text:style-name="Source_20_Text"><text:span text:style-name="T1">spaceOptimization</text:span></text:span><text:span text:style-name="Source_20_Text"><text:span text:style-name="T7">:</text:span></text:span><text:span text:style-name="Source_20_Text"><text:span text:style-name="T1"> report.aiValidation.scores.spaceOptimization.score,</text:span></text:span></text:p>
      <text:p text:style-name="P6"><text:span text:style-name="Source_20_Text"><text:span text:style-name="T2"><text:s text:c="8"/></text:span></text:span><text:span text:style-name="Source_20_Text"><text:span text:style-name="T1">sustainabilityScore</text:span></text:span><text:span text:style-name="Source_20_Text"><text:span text:style-name="T7">:</text:span></text:span><text:span text:style-name="Source_20_Text"><text:span text:style-name="T1"> report.aiValidation.scores.sustainability.score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Certification numérique</text:span></text:span></text:p>
      <text:p text:style-name="P6"><text:span text:style-name="Source_20_Text"><text:span text:style-name="T2"><text:s text:c="6"/></text:span></text:span><text:span text:style-name="Source_20_Text"><text:span text:style-name="T1">digitalSignatur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signCertification</text:span></text:span><text:span text:style-name="Source_20_Text"><text:span text:style-name="T1">(report),</text:span></text:span></text:p>
      <text:p text:style-name="P6"><text:span text:style-name="Source_20_Text"><text:span text:style-name="T2"><text:s text:c="6"/></text:span></text:span><text:span text:style-name="Source_20_Text"><text:span text:style-name="T1">qrCod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CertificationQR</text:span></text:span><text:span text:style-name="Source_20_Text"><text:span text:style-name="T1">(report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Formats d'export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1">exports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pdf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PDFCertification</text:span></text:span><text:span text:style-name="Source_20_Text"><text:span text:style-name="T1">(report),</text:span></text:span></text:p>
      <text:p text:style-name="P6"><text:span text:style-name="Source_20_Text"><text:span text:style-name="T2"><text:s text:c="8"/></text:span></text:span><text:span text:style-name="Source_20_Text"><text:span text:style-name="T1">js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JSON</text:span></text:span><text:span text:style-name="Source_20_Text"><text:span text:style-name="T1">.</text:span></text:span><text:span text:style-name="Source_20_Text"><text:span text:style-name="T7">stringify</text:span></text:span><text:span text:style-name="Source_20_Text"><text:span text:style-name="T1">(report, </text:span></text:span><text:span text:style-name="Source_20_Text"><text:span text:style-name="T5">null</text:span></text:span><text:span text:style-name="Source_20_Text"><text:span text:style-name="T1">, </text:span></text:span><text:span text:style-name="Source_20_Text"><text:span text:style-name="T6">2</text:span></text:span><text:span text:style-name="Source_20_Text"><text:span text:style-name="T1">),</text:span></text:span></text:p>
      <text:p text:style-name="P6"><text:span text:style-name="Source_20_Text"><text:span text:style-name="T2"><text:s text:c="8"/></text:span></text:span><text:span text:style-name="Source_20_Text"><text:span text:style-name="T1">xm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XMLCertification</text:span></text:span><text:span text:style-name="Source_20_Text"><text:span text:style-name="T1">(report)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certification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Règles métier configurable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BusinessRule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7">constructor</text:span></text:span><text:span text:style-name="Source_20_Text"><text:span text:style-name="T1">(</text:span></text:span></text:p>
      <text:p text:style-name="P6"><text:span text:style-name="Source_20_Text"><text:span text:style-name="T2"><text:s text:c="4"/></text:span></text:span><text:span text:style-name="Source_20_Text"><text:span text:style-name="T5">public</text:span></text:span><text:span text:style-name="Source_20_Text"><text:span text:style-name="T1"> i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5">public</text:span></text:span><text:span text:style-name="Source_20_Text"><text:span text:style-name="T1"> nam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5">public</text:span></text:span><text:span text:style-name="Source_20_Text"><text:span text:style-name="T1"> descrip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5">public</text:span></text:span><text:span text:style-name="Source_20_Text"><text:span text:style-name="T1"> category</text:span></text:span><text:span text:style-name="Source_20_Text"><text:span text:style-name="T7">:</text:span></text:span><text:span text:style-name="Source_20_Text"><text:span text:style-name="T1"> RuleCategory,</text:span></text:span></text:p>
      <text:p text:style-name="P6"><text:span text:style-name="Source_20_Text"><text:span text:style-name="T2"><text:s text:c="4"/></text:span></text:span><text:span text:style-name="Source_20_Text"><text:span text:style-name="T5">public</text:span></text:span><text:span text:style-name="Source_20_Text"><text:span text:style-name="T1"> severit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critical'</text:span></text:span><text:span text:style-name="Source_20_Text"><text:span text:style-name="T1"> </text:span></text:span><text:span text:style-name="Source_20_Text"><text:span text:style-name="T7">|</text:span></text:span><text:span text:style-name="Source_20_Text"><text:span text:style-name="T1"> </text:span></text:span><text:span text:style-name="Source_20_Text"><text:span text:style-name="T8">'warning'</text:span></text:span><text:span text:style-name="Source_20_Text"><text:span text:style-name="T1"> </text:span></text:span><text:span text:style-name="Source_20_Text"><text:span text:style-name="T7">|</text:span></text:span><text:span text:style-name="Source_20_Text"><text:span text:style-name="T1"> </text:span></text:span><text:span text:style-name="Source_20_Text"><text:span text:style-name="T8">'info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5">public</text:span></text:span><text:span text:style-name="Source_20_Text"><text:span text:style-name="T1"> </text:span></text:span><text:span text:style-name="Source_20_Text"><text:span text:style-name="T7">validator:</text:span></text:span><text:span text:style-name="Source_20_Text"><text:span text:style-name="T1"> (design</text:span></text:span><text:span text:style-name="Source_20_Text"><text:span text:style-name="T7">:</text:span></text:span><text:span text:style-name="Source_20_Text"><text:span text:style-name="T1"> KitchenDesign)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RuleResult</text:span></text:span><text:span text:style-name="Source_20_Text"><text:span text:style-name="T7">&gt;</text:span></text:span></text:p>
      <text:p text:style-name="P6"><text:span text:style-name="Source_20_Text"><text:span text:style-name="T2"><text:s text:c="2"/></text:span></text:span><text:span text:style-name="Source_20_Text"><text:span text:style-name="T1">) {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validate</text:span></text:span><text:span text:style-name="Source_20_Text"><text:span text:style-name="T1">(design</text:span></text:span><text:span text:style-name="Source_20_Text"><text:span text:style-name="T7">:</text:span></text:span><text:span text:style-name="Source_20_Text"><text:span text:style-name="T1"> KitchenDesign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Rule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try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validator</text:span></text:span><text:span text:style-name="Source_20_Text"><text:span text:style-name="T1">(design);</text:span></text:span></text:p>
      <text:p text:style-name="P6"><text:span text:style-name="Source_20_Text"><text:span text:style-name="T2"><text:s text:c="4"/></text:span></text:span><text:span text:style-name="Source_20_Text"><text:span text:style-name="T1">} </text:span></text:span><text:span text:style-name="Source_20_Text"><text:span text:style-name="T5">catch</text:span></text:span><text:span text:style-name="Source_20_Text"><text:span text:style-name="T1"> (error) {</text:span></text:span></text:p>
      <text:p text:style-name="P6"><text:span text:style-name="Source_20_Text"><text:span text:style-name="T2"><text:s text:c="6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passed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false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error</text:span></text:span><text:span text:style-name="Source_20_Text"><text:span text:style-name="T7">:</text:span></text:span><text:span text:style-name="Source_20_Text"><text:span text:style-name="T1"> error.message,</text:span></text:span></text:p>
      <text:p text:style-name="P6"><text:span text:style-name="Source_20_Text"><text:span text:style-name="T2"><text:s text:c="8"/></text:span></text:span><text:span text:style-name="Source_20_Text"><text:span text:style-name="T1">critica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severity </text:span></text:span><text:span text:style-name="Source_20_Text"><text:span text:style-name="T7">===</text:span></text:span><text:span text:style-name="Source_20_Text"><text:span text:style-name="T1"> </text:span></text:span><text:span text:style-name="Source_20_Text"><text:span text:style-name="T8">'critical'</text:span></text:span></text:p>
      <text:p text:style-name="P6"><text:span text:style-name="Source_20_Text"><text:span text:style-name="T2"><text:s text:c="6"/></text:span></text:span><text:span text:style-name="Source_20_Text"><text:span text:style-name="T1">}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Générateur de rapports automatique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ValidationReportGenerator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nerate</text:span></text:span><text:span text:style-name="Source_20_Text"><text:span text:style-name="T1">(validationData</text:span></text:span><text:span text:style-name="Source_20_Text"><text:span text:style-name="T7">:</text:span></text:span><text:span text:style-name="Source_20_Text"><text:span text:style-name="T1"> ValidationData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ValidationRepor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report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4">// Métadonnées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1">id</text:span></text:span><text:span text:style-name="Source_20_Text"><text:span text:style-name="T7">:</text:span></text:span><text:span text:style-name="Source_20_Text"><text:span text:style-name="T1"> validationData.validationId,</text:span></text:span></text:p>
      <text:p text:style-name="P6"><text:span text:style-name="Source_20_Text"><text:span text:style-name="T2"><text:s text:c="6"/></text:span></text:span><text:span text:style-name="Source_20_Text"><text:span text:style-name="T1">designId</text:span></text:span><text:span text:style-name="Source_20_Text"><text:span text:style-name="T7">:</text:span></text:span><text:span text:style-name="Source_20_Text"><text:span text:style-name="T1"> validationData.design.id,</text:span></text:span></text:p>
      <text:p text:style-name="P6"><text:span text:style-name="Source_20_Text"><text:span text:style-name="T2"><text:s text:c="6"/></text:span></text:span><text:span text:style-name="Source_20_Text"><text:span text:style-name="T1">timestamp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Date</text:span></text:span><text:span text:style-name="Source_20_Text"><text:span text:style-name="T1">().</text:span></text:span><text:span text:style-name="Source_20_Text"><text:span text:style-name="T7">toISOString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1">validationTime</text:span></text:span><text:span text:style-name="Source_20_Text"><text:span text:style-name="T7">:</text:span></text:span><text:span text:style-name="Source_20_Text"><text:span text:style-name="T1"> validationData.validationTime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Résumé exécutif</text:span></text:span></text:p>
      <text:p text:style-name="P6"><text:span text:style-name="Source_20_Text"><text:span text:style-name="T2"><text:s text:c="6"/></text:span></text:span><text:span text:style-name="Source_20_Text"><text:span text:style-name="T1">executiveSummar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ExecutiveSummary</text:span></text:span><text:span text:style-name="Source_20_Text"><text:span text:style-name="T1">(validationData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Détails par catégorie</text:span></text:span></text:p>
      <text:p text:style-name="P6"><text:span text:style-name="Source_20_Text"><text:span text:style-name="T2"><text:s text:c="6"/></text:span></text:span><text:span text:style-name="Source_20_Text"><text:span text:style-name="T1">safet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SafetySection</text:span></text:span><text:span text:style-name="Source_20_Text"><text:span text:style-name="T1">(validationData.staticValidation),</text:span></text:span></text:p>
      <text:p text:style-name="P6"><text:span text:style-name="Source_20_Text"><text:span text:style-name="T2"><text:s text:c="6"/></text:span></text:span><text:span text:style-name="Source_20_Text"><text:span text:style-name="T1">ergonomic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ErgonomicsSection</text:span></text:span><text:span text:style-name="Source_20_Text"><text:span text:style-name="T1">(validationData.aiValidation),</text:span></text:span></text:p>
      <text:p text:style-name="P6"><text:span text:style-name="Source_20_Text"><text:span text:style-name="T2"><text:s text:c="6"/></text:span></text:span><text:span text:style-name="Source_20_Text"><text:span text:style-name="T1">complianc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ComplianceSection</text:span></text:span><text:span text:style-name="Source_20_Text"><text:span text:style-name="T1">(validationData.staticValidation),</text:span></text:span></text:p>
      <text:p text:style-name="P6"><text:span text:style-name="Source_20_Text"><text:span text:style-name="T2"><text:s text:c="6"/></text:span></text:span><text:span text:style-name="Source_20_Text"><text:span text:style-name="T7">performance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PerformanceSection</text:span></text:span><text:span text:style-name="Source_20_Text"><text:span text:style-name="T1">(validationData.aiValidation),</text:span></text:span></text:p>
      <text:p text:style-name="P6"><text:span text:style-name="Source_20_Text"><text:span text:style-name="T2"><text:s text:c="6"/></text:span></text:span><text:span text:style-name="Source_20_Text"><text:span text:style-name="T1">sustainabilit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SustainabilitySection</text:span></text:span><text:span text:style-name="Source_20_Text"><text:span text:style-name="T1">(validationData.aiValidation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Recommandations</text:span></text:span></text:p>
      <text:p text:style-name="P6"><text:span text:style-name="Source_20_Text"><text:span text:style-name="T2"><text:s text:c="6"/></text:span></text:span><text:span text:style-name="Source_20_Text"><text:span text:style-name="T1">recommenda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Recommendations</text:span></text:span><text:span text:style-name="Source_20_Text"><text:span text:style-name="T1">(validationData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Corrections automatiques</text:span></text:span></text:p>
      <text:p text:style-name="P6"><text:span text:style-name="Source_20_Text"><text:span text:style-name="T2"><text:s text:c="6"/></text:span></text:span><text:span text:style-name="Source_20_Text"><text:span text:style-name="T1">autoCorrections</text:span></text:span><text:span text:style-name="Source_20_Text"><text:span text:style-name="T7">:</text:span></text:span><text:span text:style-name="Source_20_Text"><text:span text:style-name="T1"> validationData.autoCorrections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Scores et métriques</text:span></text:span></text:p>
      <text:p text:style-name="P6"><text:span text:style-name="Source_20_Text"><text:span text:style-name="T2"><text:s text:c="6"/></text:span></text:span><text:span text:style-name="Source_20_Text"><text:span text:style-name="T1">scor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ScoresSummary</text:span></text:span><text:span text:style-name="Source_20_Text"><text:span text:style-name="T1">(validationData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Visualisations</text:span></text:span></text:p>
      <text:p text:style-name="P6"><text:span text:style-name="Source_20_Text"><text:span text:style-name="T2"><text:s text:c="6"/></text:span></text:span><text:span text:style-name="Source_20_Text"><text:span text:style-name="T1">chart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Charts</text:span></text:span><text:span text:style-name="Source_20_Text"><text:span text:style-name="T1">(validationData),</text:span></text:span></text:p>
      <text:p text:style-name="P6"><text:span text:style-name="Source_20_Text"><text:span text:style-name="T2"><text:s text:c="6"/></text:span></text:span></text:p>
      <text:p text:style-name="P6"><text:span text:style-name="Source_20_Text"><text:span text:style-name="T2"><text:s text:c="6"/></text:span></text:span><text:span text:style-name="Source_20_Text"><text:span text:style-name="T4">// Annexes techniques</text:span></text:span></text:p>
      <text:p text:style-name="P6"><text:span text:style-name="Source_20_Text"><text:span text:style-name="T2"><text:s text:c="6"/></text:span></text:span><text:span text:style-name="Source_20_Text"><text:span text:style-name="T1">technicalAppendix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TechnicalAppendix</text:span></text:span><text:span text:style-name="Source_20_Text"><text:span text:style-name="T1">(validationData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report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</text:span></text:span></text:p>
      <text:p text:style-name="Horizontal_20_Line"/>
      <text:h text:style-name="Heading_20_2" text:outline-level="2"><text:soft-page-break/>?￯ﾸﾏ Roadmap Pragmatique et Accessible</text:h>
      <text:h text:style-name="Heading_20_3" text:outline-level="3">Phase 1 : Fondations Solides (0-6 mois)</text:h>
      <text:p text:style-name="P3">typescript</text:p>
      <text:p text:style-name="P5"><text:span text:style-name="Source_20_Text"><text:span text:style-name="T3">// Sprint 1-2 : Core Engine &amp; API (2 mois)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PHASE_1_SPRINT_1_2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1">objectiv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Core Engine simplifié avec fallback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API RESTful complète avec OpenAPI 3.1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SDK TypeScript/JavaScript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Documentation interactive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deliverabl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Service Registry avec auto-healing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Endpoints API complet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SDK auto-généré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Tests unitaires (&gt;90% coverage)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risqu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Faibles - Technologies matures'</text:span></text:span><text:span text:style-name="Source_20_Text"><text:span text:style-name="T1">,</text:span></text:span></text:p>
      <text:p text:style-name="P6"><text:span text:style-name="Source_20_Text"><text:span text:style-name="T2"><text:s text:c="2"/></text:span></text:span><text:span text:style-name="Source_20_Text"><text:span text:style-name="T1">investissemen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déré'</text:span></text:span></text:p>
      <text:p text:style-name="P6"><text:span text:style-name="Source_20_Text"><text:span text:style-name="T1">};</text:span></text:span></text:p>
      <text:p text:style-name="P6"/>
      <text:p text:style-name="P7"><text:span text:style-name="Source_20_Text"><text:span text:style-name="T3">// Sprint 3-4 : Design Validator &amp; No-Code (2 mois)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PHASE_1_SPRINT_3_4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1">objectiv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Design Validator complet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Interface no-code basiqu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Catalog integration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Partner onboarding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deliverabl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Validation engine avec 50+ règl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Interface drag-and-drop contraint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Système upload catalogu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Dashboard partenaires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risqu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Faibles-Moyens'</text:span></text:span><text:span text:style-name="Source_20_Text"><text:span text:style-name="T1">,</text:span></text:span></text:p>
      <text:p text:style-name="P6"><text:span text:style-name="Source_20_Text"><text:span text:style-name="T2"><text:s text:c="2"/></text:span></text:span><text:span text:style-name="Source_20_Text"><text:span text:style-name="T1">investissemen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déré'</text:span></text:span></text:p>
      <text:p text:style-name="P6"><text:span text:style-name="Source_20_Text"><text:span text:style-name="T1">};</text:span></text:span></text:p>
      <text:p text:style-name="P6"><text:soft-page-break/></text:p>
      <text:p text:style-name="P7"><text:span text:style-name="Source_20_Text"><text:span text:style-name="T3">// Sprint 5-6 : Corrections Auto &amp; Analytics (2 mois)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PHASE_1_SPRINT_5_6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1">objectiv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Auto-corrections intelligent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Analytics &amp; monitoring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Performance optimization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Security hardening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deliverabl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Auto-corrector avec ML basiqu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Dashboard analytics temps réel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Cache intelligent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Audit de sécurité complet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risqu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yens'</text:span></text:span><text:span text:style-name="Source_20_Text"><text:span text:style-name="T1">,</text:span></text:span></text:p>
      <text:p text:style-name="P6"><text:span text:style-name="Source_20_Text"><text:span text:style-name="T2"><text:s text:c="2"/></text:span></text:span><text:span text:style-name="Source_20_Text"><text:span text:style-name="T1">investissemen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déré-Élevé'</text:span></text:span></text:p>
      <text:p text:style-name="P4"><text:span text:style-name="Source_20_Text"><text:span text:style-name="T1">};</text:span></text:span></text:p>
      <text:h text:style-name="Heading_20_3" text:outline-level="3">Phase 2 : Intelligence Accessible (6-12 mois)</text:h>
      <text:p text:style-name="P3">typescript</text:p>
      <text:p text:style-name="P5"><text:span text:style-name="Source_20_Text"><text:span text:style-name="T3">// Sprint 7-9 : IA Pragmatique (3 mois)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PHASE_2_SPRINT_7_9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1">objectiv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Style analyzer avec fallbacks simpl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Recommandations basiques mais fiabl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Edge computing pour performanc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Première version mobile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deliverabl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Modèle style analysis optimisé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Engine recommandations hybrid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App mobile cross-platform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Edge inference SDK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risqu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yens - IA contrôlée'</text:span></text:span><text:span text:style-name="Source_20_Text"><text:span text:style-name="T1">,</text:span></text:span></text:p>
      <text:p text:style-name="P6"><text:span text:style-name="Source_20_Text"><text:span text:style-name="T2"><text:s text:c="2"/></text:span></text:span><text:span text:style-name="Source_20_Text"><text:span text:style-name="T1">investissemen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Élevé'</text:span></text:span></text:p>
      <text:p text:style-name="P6"><text:span text:style-name="Source_20_Text"><text:span text:style-name="T1">};</text:span></text:span></text:p>
      <text:p text:style-name="P6"/>
      <text:p text:style-name="P7"><text:soft-page-break/><text:span text:style-name="Source_20_Text"><text:span text:style-name="T3">// Sprint 10-12 : Durabilité &amp; Collaboration (3 mois)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PHASE_2_SPRINT_10_12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1">objectiv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Module durabilité automatisé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Collaboration temps réel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VR/AR basiqu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Marketplace partenaires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deliverables</text:span></text:span><text:span text:style-name="Source_20_Text"><text:span text:style-name="T7">:</text:span></text:span><text:span text:style-name="Source_20_Text"><text:span text:style-name="T1"> [</text:span></text:span></text:p>
      <text:p text:style-name="P6"><text:span text:style-name="Source_20_Text"><text:span text:style-name="T2"><text:s text:c="4"/></text:span></text:span><text:span text:style-name="Source_20_Text"><text:span text:style-name="T8">'Calculateur empreinte carbon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Collaboration WebRTC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Viewer 3D/VR simpl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8">'Marketplace avec paiements'</text:span></text:span></text:p>
      <text:p text:style-name="P6"><text:span text:style-name="Source_20_Text"><text:span text:style-name="T2"><text:s text:c="2"/></text:span></text:span><text:span text:style-name="Source_20_Text"><text:span text:style-name="T1">],</text:span></text:span></text:p>
      <text:p text:style-name="P6"><text:span text:style-name="Source_20_Text"><text:span text:style-name="T2"><text:s text:c="2"/></text:span></text:span><text:span text:style-name="Source_20_Text"><text:span text:style-name="T1">risqu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yens-Élevés'</text:span></text:span><text:span text:style-name="Source_20_Text"><text:span text:style-name="T1">,</text:span></text:span></text:p>
      <text:p text:style-name="P6"><text:span text:style-name="Source_20_Text"><text:span text:style-name="T2"><text:s text:c="2"/></text:span></text:span><text:span text:style-name="Source_20_Text"><text:span text:style-name="T1">investissemen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Élevé'</text:span></text:span></text:p>
      <text:p text:style-name="P4"><text:span text:style-name="Source_20_Text"><text:span text:style-name="T1">};</text:span></text:span></text:p>
      <text:h text:style-name="Heading_20_3" text:outline-level="3">Phase 3 : Innovation Contrôlée (12-24 mois)</text:h>
      <text:p text:style-name="P3">typescript</text:p>
      <text:p text:style-name="P5"><text:span text:style-name="Source_20_Text"><text:span text:style-name="T3">// Innovation progressive avec validation continue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PHASE_3_ROADMAP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4">// Mois 12-15 : Jumeaux numériques simplifiés</text:span></text:span></text:p>
      <text:p text:style-name="P6"><text:span text:style-name="Source_20_Text"><text:span text:style-name="T2"><text:s text:c="2"/></text:span></text:span><text:span text:style-name="Source_20_Text"><text:span text:style-name="T1">digitalTwins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approach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Simulation basique avec physique simpl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valid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POC avec 5 partenaires pilot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fallback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Calculs statiques si simulation échoue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Mois 15-18 : IA générative contrôlée</text:span></text:span></text:p>
      <text:p text:style-name="P6"><text:span text:style-name="Source_20_Text"><text:span text:style-name="T2"><text:s text:c="2"/></text:span></text:span><text:span text:style-name="Source_20_Text"><text:span text:style-name="T1">generativeAI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approach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dèles pré-entraînés avec fine-tuning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valid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A/B testing avec utilisateurs réel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fallback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emplates paramétriques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Mois 18-21 : Blockchain sélective</text:span></text:span></text:p>
      <text:p text:style-name="P6"><text:span text:style-name="Source_20_Text"><text:span text:style-name="T2"><text:s text:c="2"/></text:span></text:span><text:span text:style-name="Source_20_Text"><text:span text:style-name="T1">blockchain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approach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Certification materials premium uniquement'</text:span></text:span><text:span text:style-name="Source_20_Text"><text:span text:style-name="T1">,</text:span></text:span></text:p>
      <text:p text:style-name="P6"><text:soft-page-break/><text:span text:style-name="Source_20_Text"><text:span text:style-name="T2"><text:s text:c="4"/></text:span></text:span><text:span text:style-name="Source_20_Text"><text:span text:style-name="T1">valid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ROI démontré sur segment luxury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fallback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Base de données classique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Mois 21-24 : Métavers commercial</text:span></text:span></text:p>
      <text:p text:style-name="P6"><text:span text:style-name="Source_20_Text"><text:span text:style-name="T2"><text:s text:c="2"/></text:span></text:span><text:span text:style-name="Source_20_Text"><text:span text:style-name="T1">metaverse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approach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Showrooms virtuels pour grandes marqu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valid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Adoption mesurée et rentabilité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fallback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Visualisation 3D classique'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;</text:span></text:span></text:p>
      <text:p text:style-name="Horizontal_20_Line"/>
      <text:h text:style-name="Heading_20_2" text:outline-level="2">? Maintenance Facile &amp; Debugging Simple</text:h>
      <text:h text:style-name="Heading_20_3" text:outline-level="3">Auto-Diagnostic et Self-Healing</text:h>
      <text:p text:style-name="P3">typescript</text:p>
      <text:p text:style-name="P5"><text:span text:style-name="Source_20_Text"><text:span text:style-name="T3">// Système de diagnostic automatique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AutoDiagnosticSystem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diagnostic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7">&lt;</text:span></text:span><text:span text:style-name="Source_20_Text"><text:span text:style-name="T8">string</text:span></text:span><text:span text:style-name="Source_20_Text"><text:span text:style-name="T1">, DiagnosticCheck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1">()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healingStrategi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7">&lt;</text:span></text:span><text:span text:style-name="Source_20_Text"><text:span text:style-name="T8">string</text:span></text:span><text:span text:style-name="Source_20_Text"><text:span text:style-name="T1">, HealingStrategy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Map</text:span></text:span><text:span text:style-name="Source_20_Text"><text:span text:style-name="T1">()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Checks automatiques continus</text:span></text:span></text:p>
      <text:p text:style-name="P6"><text:span text:style-name="Source_20_Text"><text:span text:style-name="T2"><text:s text:c="2"/></text:span></text:span><text:span text:style-name="Source_20_Text"><text:span text:style-name="T7">startContinuousMonitoring</text:span></text:span><text:span text:style-name="Source_20_Text"><text:span text:style-name="T1">(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void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4">// Check toutes les 30 secondes</text:span></text:span></text:p>
      <text:p text:style-name="P6"><text:span text:style-name="Source_20_Text"><text:span text:style-name="T2"><text:s text:c="4"/></text:span></text:span><text:span text:style-name="Source_20_Text"><text:span text:style-name="T7">setInterval</text:span></text:span><text:span text:style-name="Source_20_Text"><text:span text:style-name="T1">(</text:span></text:span><text:span text:style-name="Source_20_Text"><text:span text:style-name="T5">async</text:span></text:span><text:span text:style-name="Source_20_Text"><text:span text:style-name="T1"> ()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runDiagnostics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text:span text:style-name="Source_20_Text"><text:span text:style-name="T1">}, </text:span></text:span><text:span text:style-name="Source_20_Text"><text:span text:style-name="T6">30000</text:span></text:span><text:span text:style-name="Source_20_Text"><text:span text:style-name="T1">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Check approfondi toutes les 5 minutes</text:span></text:span></text:p>
      <text:p text:style-name="P6"><text:span text:style-name="Source_20_Text"><text:span text:style-name="T2"><text:s text:c="4"/></text:span></text:span><text:span text:style-name="Source_20_Text"><text:span text:style-name="T7">setInterval</text:span></text:span><text:span text:style-name="Source_20_Text"><text:span text:style-name="T1">(</text:span></text:span><text:span text:style-name="Source_20_Text"><text:span text:style-name="T5">async</text:span></text:span><text:span text:style-name="Source_20_Text"><text:span text:style-name="T1"> ()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runDeepDiagnostics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text:span text:style-name="Source_20_Text"><text:span text:style-name="T1">}, </text:span></text:span><text:span text:style-name="Source_20_Text"><text:span text:style-name="T6">300000</text:span></text:span><text:span text:style-name="Source_20_Text"><text:span text:style-name="T1">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Diagnostic rapide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runDiagnostics</text:span></text:span><text:span text:style-name="Source_20_Text"><text:span text:style-name="T1">(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DiagnosticResult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result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1">.</text:span></text:span><text:span text:style-name="Source_20_Text"><text:span text:style-name="T7">all</text:span></text:span><text:span text:style-name="Source_20_Text"><text:span text:style-name="T1">([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DatabaseConnectivity</text:span></text:span><text:span text:style-name="Source_20_Text"><text:span text:style-name="T1">(),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APIEndpoints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ServiceHealth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MemoryUsage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CPUUsage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DiskSpace</text:span></text:span><text:span text:style-name="Source_20_Text"><text:span text:style-name="T1">()</text:span></text:span></text:p>
      <text:p text:style-name="P6"><text:span text:style-name="Source_20_Text"><text:span text:style-name="T2"><text:s text:c="4"/></text:span></text:span><text:span text:style-name="Source_20_Text"><text:span text:style-name="T1">]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issues </text:span></text:span><text:span text:style-name="Source_20_Text"><text:span text:style-name="T7">=</text:span></text:span><text:span text:style-name="Source_20_Text"><text:span text:style-name="T1"> results.</text:span></text:span><text:span text:style-name="Source_20_Text"><text:span text:style-name="T7">filter</text:span></text:span><text:span text:style-name="Source_20_Text"><text:span text:style-name="T1">(r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7">!</text:span></text:span><text:span text:style-name="Source_20_Text"><text:span text:style-name="T1">r.healthy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Auto-healing pour problèmes connus</text:span></text:span></text:p>
      <text:p text:style-name="P6"><text:span text:style-name="Source_20_Text"><text:span text:style-name="T2"><text:s text:c="4"/></text:span></text:span><text:span text:style-name="Source_20_Text"><text:span text:style-name="T5">for</text:span></text:span><text:span text:style-name="Source_20_Text"><text:span text:style-name="T1"> (</text:span></text:span><text:span text:style-name="Source_20_Text"><text:span text:style-name="T5">const</text:span></text:span><text:span text:style-name="Source_20_Text"><text:span text:style-name="T1"> issue </text:span></text:span><text:span text:style-name="Source_20_Text"><text:span text:style-name="T5">of</text:span></text:span><text:span text:style-name="Source_20_Text"><text:span text:style-name="T1"> issues) {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strategy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healingStrategies.</text:span></text:span><text:span text:style-name="Source_20_Text"><text:span text:style-name="T7">get</text:span></text:span><text:span text:style-name="Source_20_Text"><text:span text:style-name="T1">(issue.type);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strategy </text:span></text:span><text:span text:style-name="Source_20_Text"><text:span text:style-name="T7">&amp;&amp;</text:span></text:span><text:span text:style-name="Source_20_Text"><text:span text:style-name="T1"> strategy.canAutoHeal) {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pplyHealing</text:span></text:span><text:span text:style-name="Source_20_Text"><text:span text:style-name="T1">(issue, strategy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timestamp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Date</text:span></text:span><text:span text:style-name="Source_20_Text"><text:span text:style-name="T1">().</text:span></text:span><text:span text:style-name="Source_20_Text"><text:span text:style-name="T7">toISOString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1">overallHealth</text:span></text:span><text:span text:style-name="Source_20_Text"><text:span text:style-name="T7">:</text:span></text:span><text:span text:style-name="Source_20_Text"><text:span text:style-name="T1"> issues.length </text:span></text:span><text:span text:style-name="Source_20_Text"><text:span text:style-name="T7">===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,</text:span></text:span></text:p>
      <text:p text:style-name="P6"><text:span text:style-name="Source_20_Text"><text:span text:style-name="T2"><text:s text:c="6"/></text:span></text:span><text:span text:style-name="Source_20_Text"><text:span text:style-name="T1">issues,</text:span></text:span></text:p>
      <text:p text:style-name="P6"><text:span text:style-name="Source_20_Text"><text:span text:style-name="T2"><text:s text:c="6"/></text:span></text:span><text:span text:style-name="Source_20_Text"><text:span text:style-name="T1">autoHealedIssues</text:span></text:span><text:span text:style-name="Source_20_Text"><text:span text:style-name="T7">:</text:span></text:span><text:span text:style-name="Source_20_Text"><text:span text:style-name="T1"> issues.</text:span></text:span><text:span text:style-name="Source_20_Text"><text:span text:style-name="T7">filter</text:span></text:span><text:span text:style-name="Source_20_Text"><text:span text:style-name="T1">(i </text:span></text:span><text:span text:style-name="Source_20_Text"><text:span text:style-name="T7">=&gt;</text:span></text:span><text:span text:style-name="Source_20_Text"><text:span text:style-name="T1"> i.autoHealed),</text:span></text:span></text:p>
      <text:p text:style-name="P6"><text:span text:style-name="Source_20_Text"><text:span text:style-name="T2"><text:s text:c="6"/></text:span></text:span><text:span text:style-name="Source_20_Text"><text:span text:style-name="T1">manualInterventionRequired</text:span></text:span><text:span text:style-name="Source_20_Text"><text:span text:style-name="T7">:</text:span></text:span><text:span text:style-name="Source_20_Text"><text:span text:style-name="T1"> issues.</text:span></text:span><text:span text:style-name="Source_20_Text"><text:span text:style-name="T7">filter</text:span></text:span><text:span text:style-name="Source_20_Text"><text:span text:style-name="T1">(i </text:span></text:span><text:span text:style-name="Source_20_Text"><text:span text:style-name="T7">=&gt;</text:span></text:span><text:span text:style-name="Source_20_Text"><text:span text:style-name="T1"> </text:span></text:span><text:span text:style-name="Source_20_Text"><text:span text:style-name="T7">!</text:span></text:span><text:span text:style-name="Source_20_Text"><text:span text:style-name="T1">i.autoHealed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Stratégies de guérison automatique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7">setupHealingStrategies</text:span></text:span><text:span text:style-name="Source_20_Text"><text:span text:style-name="T1">(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void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4">// Redémarrage de services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healingStrategies.</text:span></text:span><text:span text:style-name="Source_20_Text"><text:span text:style-name="T7">set</text:span></text:span><text:span text:style-name="Source_20_Text"><text:span text:style-name="T1">(</text:span></text:span><text:span text:style-name="Source_20_Text"><text:span text:style-name="T8">'service_down'</text:span></text:span><text:span text:style-name="Source_20_Text"><text:span text:style-name="T1">, {</text:span></text:span></text:p>
      <text:p text:style-name="P6"><text:span text:style-name="Source_20_Text"><text:span text:style-name="T2"><text:s text:c="6"/></text:span></text:span><text:span text:style-name="Source_20_Text"><text:span text:style-name="T1">canAutoHea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true</text:span></text:span><text:span text:style-name="Source_20_Text"><text:span text:style-name="T1">,</text:span></text:span></text:p>
      <text:p text:style-name="P6"><text:span text:style-name="Source_20_Text"><text:span text:style-name="T2"><text:s text:c="6"/></text:span></text:span><text:span text:style-name="Source_20_Text"><text:span text:style-name="T7">action: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(issue)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serviceRegistry.</text:span></text:span><text:span text:style-name="Source_20_Text"><text:span text:style-name="T7">restartService</text:span></text:span><text:span text:style-name="Source_20_Text"><text:span text:style-name="T1">(issue.serviceName);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waitForServiceHealth</text:span></text:span><text:span text:style-name="Source_20_Text"><text:span text:style-name="T1">(issue.serviceName, </text:span></text:span><text:span text:style-name="Source_20_Text"><text:span text:style-name="T6">30000</text:span></text:span><text:span text:style-name="Source_20_Text"><text:span text:style-name="T1">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Nettoyage mémoire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healingStrategies.</text:span></text:span><text:span text:style-name="Source_20_Text"><text:span text:style-name="T7">set</text:span></text:span><text:span text:style-name="Source_20_Text"><text:span text:style-name="T1">(</text:span></text:span><text:span text:style-name="Source_20_Text"><text:span text:style-name="T8">'memory_leak'</text:span></text:span><text:span text:style-name="Source_20_Text"><text:span text:style-name="T1">, {</text:span></text:span></text:p>
      <text:p text:style-name="P6"><text:span text:style-name="Source_20_Text"><text:span text:style-name="T2"><text:s text:c="6"/></text:span></text:span><text:span text:style-name="Source_20_Text"><text:span text:style-name="T1">canAutoHea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true</text:span></text:span><text:span text:style-name="Source_20_Text"><text:span text:style-name="T1">,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7">action: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(issue)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garbageCollector.</text:span></text:span><text:span text:style-name="Source_20_Text"><text:span text:style-name="T7">forceCollection</text:span></text:span><text:span text:style-name="Source_20_Text"><text:span text:style-name="T1">();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cacheManager.</text:span></text:span><text:span text:style-name="Source_20_Text"><text:span text:style-name="T7">clearOldEntries</text:span></text:span><text:span text:style-name="Source_20_Text"><text:span text:style-name="T1">(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Réinitialisation connexions DB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healingStrategies.</text:span></text:span><text:span text:style-name="Source_20_Text"><text:span text:style-name="T7">set</text:span></text:span><text:span text:style-name="Source_20_Text"><text:span text:style-name="T1">(</text:span></text:span><text:span text:style-name="Source_20_Text"><text:span text:style-name="T8">'db_connection_pool_exhausted'</text:span></text:span><text:span text:style-name="Source_20_Text"><text:span text:style-name="T1">, {</text:span></text:span></text:p>
      <text:p text:style-name="P6"><text:span text:style-name="Source_20_Text"><text:span text:style-name="T2"><text:s text:c="6"/></text:span></text:span><text:span text:style-name="Source_20_Text"><text:span text:style-name="T1">canAutoHea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true</text:span></text:span><text:span text:style-name="Source_20_Text"><text:span text:style-name="T1">,</text:span></text:span></text:p>
      <text:p text:style-name="P6"><text:span text:style-name="Source_20_Text"><text:span text:style-name="T2"><text:s text:c="6"/></text:span></text:span><text:span text:style-name="Source_20_Text"><text:span text:style-name="T7">action: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(issue)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databaseManager.</text:span></text:span><text:span text:style-name="Source_20_Text"><text:span text:style-name="T7">resetConnectionPool</text:span></text:span><text:span text:style-name="Source_20_Text"><text:span text:style-name="T1">(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Vidage cache corrompu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healingStrategies.</text:span></text:span><text:span text:style-name="Source_20_Text"><text:span text:style-name="T7">set</text:span></text:span><text:span text:style-name="Source_20_Text"><text:span text:style-name="T1">(</text:span></text:span><text:span text:style-name="Source_20_Text"><text:span text:style-name="T8">'cache_corruption'</text:span></text:span><text:span text:style-name="Source_20_Text"><text:span text:style-name="T1">, {</text:span></text:span></text:p>
      <text:p text:style-name="P6"><text:span text:style-name="Source_20_Text"><text:span text:style-name="T2"><text:s text:c="6"/></text:span></text:span><text:span text:style-name="Source_20_Text"><text:span text:style-name="T1">canAutoHea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true</text:span></text:span><text:span text:style-name="Source_20_Text"><text:span text:style-name="T1">,</text:span></text:span></text:p>
      <text:p text:style-name="P6"><text:span text:style-name="Source_20_Text"><text:span text:style-name="T2"><text:s text:c="6"/></text:span></text:span><text:span text:style-name="Source_20_Text"><text:span text:style-name="T7">action: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(issue) </text:span></text:span><text:span text:style-name="Source_20_Text"><text:span text:style-name="T7">=&gt;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cacheManager.</text:span></text:span><text:span text:style-name="Source_20_Text"><text:span text:style-name="T7">invalidateCorruptedKeys</text:span></text:span><text:span text:style-name="Source_20_Text"><text:span text:style-name="T1">(issue.keys);</text:span></text:span></text:p>
      <text:p text:style-name="P6"><text:span text:style-name="Source_20_Text"><text:span text:style-name="T2"><text:s text:c="8"/>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cacheManager.</text:span></text:span><text:span text:style-name="Source_20_Text"><text:span text:style-name="T7">warmupCache</text:span></text:span><text:span text:style-name="Source_20_Text"><text:span text:style-name="T1">(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Debugging simplifié avec contexte riche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EnhancedDebugger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4">// Capture automatique du contexte lors d'erreurs</text:span></text:span></text:p>
      <text:p text:style-name="P6"><text:span text:style-name="Source_20_Text"><text:span text:style-name="T2"><text:s text:c="2"/></text:span></text:span><text:span text:style-name="Source_20_Text"><text:span text:style-name="T7">captureErrorContext</text:span></text:span><text:span text:style-name="Source_20_Text"><text:span text:style-name="T1">(error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Error</text:span></text:span><text:span text:style-name="Source_20_Text"><text:span text:style-name="T1">, context</text:span></text:span><text:span text:style-name="Source_20_Text"><text:span text:style-name="T7">:</text:span></text:span><text:span text:style-name="Source_20_Text"><text:span text:style-name="T1"> ExecutionContext)</text:span></text:span><text:span text:style-name="Source_20_Text"><text:span text:style-name="T7">:</text:span></text:span><text:span text:style-name="Source_20_Text"><text:span text:style-name="T1"> ErrorContext {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error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message</text:span></text:span><text:span text:style-name="Source_20_Text"><text:span text:style-name="T7">:</text:span></text:span><text:span text:style-name="Source_20_Text"><text:span text:style-name="T1"> error.message,</text:span></text:span></text:p>
      <text:p text:style-name="P6"><text:span text:style-name="Source_20_Text"><text:span text:style-name="T2"><text:s text:c="8"/></text:span></text:span><text:span text:style-name="Source_20_Text"><text:span text:style-name="T1">stack</text:span></text:span><text:span text:style-name="Source_20_Text"><text:span text:style-name="T7">:</text:span></text:span><text:span text:style-name="Source_20_Text"><text:span text:style-name="T1"> error.stack,</text:span></text:span></text:p>
      <text:p text:style-name="P6"><text:span text:style-name="Source_20_Text"><text:span text:style-name="T2"><text:s text:c="8"/></text:span></text:span><text:span text:style-name="Source_20_Text"><text:span text:style-name="T1">name</text:span></text:span><text:span text:style-name="Source_20_Text"><text:span text:style-name="T7">:</text:span></text:span><text:span text:style-name="Source_20_Text"><text:span text:style-name="T1"> error.name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execution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userId</text:span></text:span><text:span text:style-name="Source_20_Text"><text:span text:style-name="T7">:</text:span></text:span><text:span text:style-name="Source_20_Text"><text:span text:style-name="T1"> context.userId,</text:span></text:span></text:p>
      <text:p text:style-name="P6"><text:span text:style-name="Source_20_Text"><text:span text:style-name="T2"><text:s text:c="8"/></text:span></text:span><text:span text:style-name="Source_20_Text"><text:span text:style-name="T1">requestId</text:span></text:span><text:span text:style-name="Source_20_Text"><text:span text:style-name="T7">:</text:span></text:span><text:span text:style-name="Source_20_Text"><text:span text:style-name="T1"> context.requestId,</text:span></text:span></text:p>
      <text:p text:style-name="P6"><text:span text:style-name="Source_20_Text"><text:span text:style-name="T2"><text:s text:c="8"/></text:span></text:span><text:span text:style-name="Source_20_Text"><text:span text:style-name="T1">endpoint</text:span></text:span><text:span text:style-name="Source_20_Text"><text:span text:style-name="T7">:</text:span></text:span><text:span text:style-name="Source_20_Text"><text:span text:style-name="T1"> context.endpoint,</text:span></text:span></text:p>
      <text:p text:style-name="P6"><text:span text:style-name="Source_20_Text"><text:span text:style-name="T2"><text:s text:c="8"/></text:span></text:span><text:span text:style-name="Source_20_Text"><text:span text:style-name="T1">parameter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sanitize</text:span></text:span><text:span text:style-name="Source_20_Text"><text:span text:style-name="T1">(context.parameters),</text:span></text:span></text:p>
      <text:p text:style-name="P6"><text:soft-page-break/><text:span text:style-name="Source_20_Text"><text:span text:style-name="T2"><text:s text:c="8"/></text:span></text:span><text:span text:style-name="Source_20_Text"><text:span text:style-name="T1">timestamp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Date</text:span></text:span><text:span text:style-name="Source_20_Text"><text:span text:style-name="T1">().</text:span></text:span><text:span text:style-name="Source_20_Text"><text:span text:style-name="T7">toISOString</text:span></text:span><text:span text:style-name="Source_20_Text"><text:span text:style-name="T1">()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system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nodeVersion</text:span></text:span><text:span text:style-name="Source_20_Text"><text:span text:style-name="T7">:</text:span></text:span><text:span text:style-name="Source_20_Text"><text:span text:style-name="T1"> process.version,</text:span></text:span></text:p>
      <text:p text:style-name="P6"><text:span text:style-name="Source_20_Text"><text:span text:style-name="T2"><text:s text:c="8"/></text:span></text:span><text:span text:style-name="Source_20_Text"><text:span text:style-name="T1">memoryUsage</text:span></text:span><text:span text:style-name="Source_20_Text"><text:span text:style-name="T7">:</text:span></text:span><text:span text:style-name="Source_20_Text"><text:span text:style-name="T1"> process.</text:span></text:span><text:span text:style-name="Source_20_Text"><text:span text:style-name="T7">memoryUsage</text:span></text:span><text:span text:style-name="Source_20_Text"><text:span text:style-name="T1">(),</text:span></text:span></text:p>
      <text:p text:style-name="P6"><text:span text:style-name="Source_20_Text"><text:span text:style-name="T2"><text:s text:c="8"/></text:span></text:span><text:span text:style-name="Source_20_Text"><text:span text:style-name="T1">cpuUsage</text:span></text:span><text:span text:style-name="Source_20_Text"><text:span text:style-name="T7">:</text:span></text:span><text:span text:style-name="Source_20_Text"><text:span text:style-name="T1"> process.</text:span></text:span><text:span text:style-name="Source_20_Text"><text:span text:style-name="T7">cpuUsage</text:span></text:span><text:span text:style-name="Source_20_Text"><text:span text:style-name="T1">(),</text:span></text:span></text:p>
      <text:p text:style-name="P6"><text:span text:style-name="Source_20_Text"><text:span text:style-name="T2"><text:s text:c="8"/></text:span></text:span><text:span text:style-name="Source_20_Text"><text:span text:style-name="T1">uptime</text:span></text:span><text:span text:style-name="Source_20_Text"><text:span text:style-name="T7">:</text:span></text:span><text:span text:style-name="Source_20_Text"><text:span text:style-name="T1"> process.</text:span></text:span><text:span text:style-name="Source_20_Text"><text:span text:style-name="T7">uptime</text:span></text:span><text:span text:style-name="Source_20_Text"><text:span text:style-name="T1">()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application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version</text:span></text:span><text:span text:style-name="Source_20_Text"><text:span text:style-name="T7">:</text:span></text:span><text:span text:style-name="Source_20_Text"><text:span text:style-name="T1"> process.env.</text:span></text:span><text:span text:style-name="Source_20_Text"><text:span text:style-name="T6">APP_VERSION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environment</text:span></text:span><text:span text:style-name="Source_20_Text"><text:span text:style-name="T7">:</text:span></text:span><text:span text:style-name="Source_20_Text"><text:span text:style-name="T1"> process.env.</text:span></text:span><text:span text:style-name="Source_20_Text"><text:span text:style-name="T6">NODE_ENV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serviceName</text:span></text:span><text:span text:style-name="Source_20_Text"><text:span text:style-name="T7">:</text:span></text:span><text:span text:style-name="Source_20_Text"><text:span text:style-name="T1"> context.serviceName,</text:span></text:span></text:p>
      <text:p text:style-name="P6"><text:span text:style-name="Source_20_Text"><text:span text:style-name="T2"><text:s text:c="8"/></text:span></text:span><text:span text:style-name="Source_20_Text"><text:span text:style-name="T1">buildNumber</text:span></text:span><text:span text:style-name="Source_20_Text"><text:span text:style-name="T7">:</text:span></text:span><text:span text:style-name="Source_20_Text"><text:span text:style-name="T1"> process.env.</text:span></text:span><text:span text:style-name="Source_20_Text"><text:span text:style-name="T6">BUILD_NUMBER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dependencies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1">activeDatabas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ActiveDatabaseConnections</text:span></text:span><text:span text:style-name="Source_20_Text"><text:span text:style-name="T1">(),</text:span></text:span></text:p>
      <text:p text:style-name="P6"><text:span text:style-name="Source_20_Text"><text:span text:style-name="T2"><text:s text:c="8"/></text:span></text:span><text:span text:style-name="Source_20_Text"><text:span text:style-name="T1">externalAPI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ExternalAPIStatus</text:span></text:span><text:span text:style-name="Source_20_Text"><text:span text:style-name="T1">(),</text:span></text:span></text:p>
      <text:p text:style-name="P6"><text:span text:style-name="Source_20_Text"><text:span text:style-name="T2"><text:s text:c="8"/></text:span></text:span><text:span text:style-name="Source_20_Text"><text:span text:style-name="T1">cacheStatu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CacheStatus</text:span></text:span><text:span text:style-name="Source_20_Text"><text:span text:style-name="T1">()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Suggestions automatiques de résolution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nerateResolutionSuggestions</text:span></text:span><text:span text:style-name="Source_20_Text"><text:span text:style-name="T1">(errorContext</text:span></text:span><text:span text:style-name="Source_20_Text"><text:span text:style-name="T7">:</text:span></text:span><text:span text:style-name="Source_20_Text"><text:span text:style-name="T1"> ErrorContext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ResolutionSuggestion[]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suggestions</text:span></text:span><text:span text:style-name="Source_20_Text"><text:span text:style-name="T7">:</text:span></text:span><text:span text:style-name="Source_20_Text"><text:span text:style-name="T1"> ResolutionSuggestion[] </text:span></text:span><text:span text:style-name="Source_20_Text"><text:span text:style-name="T7">=</text:span></text:span><text:span text:style-name="Source_20_Text"><text:span text:style-name="T1"> []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Analyse basée sur l'historique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similarError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findSimilarErrors</text:span></text:span><text:span text:style-name="Source_20_Text"><text:span text:style-name="T1">(errorContext.error);</text:span></text:span></text:p>
      <text:p text:style-name="P6"><text:span text:style-name="Source_20_Text"><text:span text:style-name="T2"><text:s text:c="4"/></text:span></text:span><text:span text:style-name="Source_20_Text"><text:span text:style-name="T5">if</text:span></text:span><text:span text:style-name="Source_20_Text"><text:span text:style-name="T1"> (similarErrors.length 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) {</text:span></text:span></text:p>
      <text:p text:style-name="P6"><text:span text:style-name="Source_20_Text"><text:span text:style-name="T2"><text:s text:c="6"/></text:span></text:span><text:span text:style-name="Source_20_Text"><text:span text:style-name="T5">const</text:span></text:span><text:span text:style-name="Source_20_Text"><text:span text:style-name="T1"> successfulResolutions </text:span></text:span><text:span text:style-name="Source_20_Text"><text:span text:style-name="T7">=</text:span></text:span><text:span text:style-name="Source_20_Text"><text:span text:style-name="T1"> similarErrors.</text:span></text:span><text:span text:style-name="Source_20_Text"><text:span text:style-name="T7">filter</text:span></text:span><text:span text:style-name="Source_20_Text"><text:span text:style-name="T1">(e </text:span></text:span><text:span text:style-name="Source_20_Text"><text:span text:style-name="T7">=&gt;</text:span></text:span><text:span text:style-name="Source_20_Text"><text:span text:style-name="T1"> e.resolved);</text:span></text:span></text:p>
      <text:p text:style-name="P6"><text:span text:style-name="Source_20_Text"><text:span text:style-name="T2"><text:s text:c="6"/></text:span></text:span><text:span text:style-name="Source_20_Text"><text:span text:style-name="T5">if</text:span></text:span><text:span text:style-name="Source_20_Text"><text:span text:style-name="T1"> (successfulResolutions.length 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) {</text:span></text:span></text:p>
      <text:p text:style-name="P6"><text:span text:style-name="Source_20_Text"><text:span text:style-name="T2"><text:s text:c="8"/></text:span></text:span><text:span text:style-name="Source_20_Text"><text:span text:style-name="T1">suggestions.</text:span></text:span><text:span text:style-name="Source_20_Text"><text:span text:style-name="T7">push</text:span></text:span><text:span text:style-name="Source_20_Text"><text:span text:style-name="T1">({</text:span></text:span></text:p>
      <text:p text:style-name="P6"><text:span text:style-name="Source_20_Text"><text:span text:style-name="T2"><text:s text:c="10"/></text:span></text:span><text:span text:style-name="Source_20_Text"><text:span text:style-name="T1">typ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historical'</text:span></text:span><text:span text:style-name="Source_20_Text"><text:span text:style-name="T1">,</text:span></text:span></text:p>
      <text:p text:style-name="P6"><text:span text:style-name="Source_20_Text"><text:span text:style-name="T2"><text:s text:c="10"/></text:span></text:span><text:span text:style-name="Source_20_Text"><text:span text:style-name="T1">confidenc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8</text:span></text:span><text:span text:style-name="Source_20_Text"><text:span text:style-name="T1">,</text:span></text:span></text:p>
      <text:p text:style-name="P6"><text:span text:style-name="Source_20_Text"><text:span text:style-name="T2"><text:s text:c="10"/></text:span></text:span><text:span text:style-name="Source_20_Text"><text:span text:style-name="T1">descrip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Solution trouvée dans l\'historique'</text:span></text:span><text:span text:style-name="Source_20_Text"><text:span text:style-name="T1">,</text:span></text:span></text:p>
      <text:p text:style-name="P6"><text:span text:style-name="Source_20_Text"><text:span text:style-name="T2"><text:s text:c="10"/></text:span></text:span><text:span text:style-name="Source_20_Text"><text:span text:style-name="T1">steps</text:span></text:span><text:span text:style-name="Source_20_Text"><text:span text:style-name="T7">:</text:span></text:span><text:span text:style-name="Source_20_Text"><text:span text:style-name="T1"> successfulResolutions[</text:span></text:span><text:span text:style-name="Source_20_Text"><text:span text:style-name="T6">0</text:span></text:span><text:span text:style-name="Source_20_Text"><text:span text:style-name="T1">].resolutionSteps</text:span></text:span></text:p>
      <text:p text:style-name="P6"><text:span text:style-name="Source_20_Text"><text:span text:style-name="T2"><text:s text:c="8"/></text:span></text:span><text:span text:style-name="Source_20_Text"><text:span text:style-name="T1">});</text:span></text:span></text:p>
      <text:p text:style-name="P6"><text:span text:style-name="Source_20_Text"><text:span text:style-name="T2"><text:s text:c="6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oft-page-break/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Analyse automatique du code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odeAnalysi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nalyzeCode</text:span></text:span><text:span text:style-name="Source_20_Text"><text:span text:style-name="T1">(errorContext);</text:span></text:span></text:p>
      <text:p text:style-name="P6"><text:span text:style-name="Source_20_Text"><text:span text:style-name="T2"><text:s text:c="4"/></text:span></text:span><text:span text:style-name="Source_20_Text"><text:span text:style-name="T5">if</text:span></text:span><text:span text:style-name="Source_20_Text"><text:span text:style-name="T1"> (codeAnalysis.potentialFixes.length 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) {</text:span></text:span></text:p>
      <text:p text:style-name="P6"><text:span text:style-name="Source_20_Text"><text:span text:style-name="T2"><text:s text:c="6"/></text:span></text:span><text:span text:style-name="Source_20_Text"><text:span text:style-name="T1">suggestions.</text:span></text:span><text:span text:style-name="Source_20_Text"><text:span text:style-name="T7">push</text:span></text:span><text:span text:style-name="Source_20_Text"><text:span text:style-name="T1">(</text:span></text:span><text:span text:style-name="Source_20_Text"><text:span text:style-name="T7">...</text:span></text:span><text:span text:style-name="Source_20_Text"><text:span text:style-name="T1">codeAnalysis.potentialFixes.</text:span></text:span><text:span text:style-name="Source_20_Text"><text:span text:style-name="T7">map</text:span></text:span><text:span text:style-name="Source_20_Text"><text:span text:style-name="T1">(fix </text:span></text:span><text:span text:style-name="Source_20_Text"><text:span text:style-name="T7">=&gt;</text:span></text:span><text:span text:style-name="Source_20_Text"><text:span text:style-name="T1"> ({</text:span></text:span></text:p>
      <text:p text:style-name="P6"><text:span text:style-name="Source_20_Text"><text:span text:style-name="T2"><text:s text:c="8"/></text:span></text:span><text:span text:style-name="Source_20_Text"><text:span text:style-name="T1">typ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code_analysis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confidence</text:span></text:span><text:span text:style-name="Source_20_Text"><text:span text:style-name="T7">:</text:span></text:span><text:span text:style-name="Source_20_Text"><text:span text:style-name="T1"> fix.confidence,</text:span></text:span></text:p>
      <text:p text:style-name="P6"><text:span text:style-name="Source_20_Text"><text:span text:style-name="T2"><text:s text:c="8"/></text:span></text:span><text:span text:style-name="Source_20_Text"><text:span text:style-name="T1">description</text:span></text:span><text:span text:style-name="Source_20_Text"><text:span text:style-name="T7">:</text:span></text:span><text:span text:style-name="Source_20_Text"><text:span text:style-name="T1"> fix.description,</text:span></text:span></text:p>
      <text:p text:style-name="P6"><text:span text:style-name="Source_20_Text"><text:span text:style-name="T2"><text:s text:c="8"/></text:span></text:span><text:span text:style-name="Source_20_Text"><text:span text:style-name="T1">steps</text:span></text:span><text:span text:style-name="Source_20_Text"><text:span text:style-name="T7">:</text:span></text:span><text:span text:style-name="Source_20_Text"><text:span text:style-name="T1"> fix.steps,</text:span></text:span></text:p>
      <text:p text:style-name="P6"><text:span text:style-name="Source_20_Text"><text:span text:style-name="T2"><text:s text:c="8"/></text:span></text:span><text:span text:style-name="Source_20_Text"><text:span text:style-name="T1">autoApplicable</text:span></text:span><text:span text:style-name="Source_20_Text"><text:span text:style-name="T7">:</text:span></text:span><text:span text:style-name="Source_20_Text"><text:span text:style-name="T1"> fix.autoApplicable</text:span></text:span></text:p>
      <text:p text:style-name="P6"><text:span text:style-name="Source_20_Text"><text:span text:style-name="T2"><text:s text:c="6"/></text:span></text:span><text:span text:style-name="Source_20_Text"><text:span text:style-name="T1">})))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Suggestions de configuration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onfigIssue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detectConfigurationIssues</text:span></text:span><text:span text:style-name="Source_20_Text"><text:span text:style-name="T1">(errorContext);</text:span></text:span></text:p>
      <text:p text:style-name="P6"><text:span text:style-name="Source_20_Text"><text:span text:style-name="T2"><text:s text:c="4"/></text:span></text:span><text:span text:style-name="Source_20_Text"><text:span text:style-name="T5">if</text:span></text:span><text:span text:style-name="Source_20_Text"><text:span text:style-name="T1"> (configIssues.length 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6">0</text:span></text:span><text:span text:style-name="Source_20_Text"><text:span text:style-name="T1">) {</text:span></text:span></text:p>
      <text:p text:style-name="P6"><text:span text:style-name="Source_20_Text"><text:span text:style-name="T2"><text:s text:c="6"/></text:span></text:span><text:span text:style-name="Source_20_Text"><text:span text:style-name="T1">suggestions.</text:span></text:span><text:span text:style-name="Source_20_Text"><text:span text:style-name="T7">push</text:span></text:span><text:span text:style-name="Source_20_Text"><text:span text:style-name="T1">(</text:span></text:span><text:span text:style-name="Source_20_Text"><text:span text:style-name="T7">...</text:span></text:span><text:span text:style-name="Source_20_Text"><text:span text:style-name="T1">configIssues.</text:span></text:span><text:span text:style-name="Source_20_Text"><text:span text:style-name="T7">map</text:span></text:span><text:span text:style-name="Source_20_Text"><text:span text:style-name="T1">(issue </text:span></text:span><text:span text:style-name="Source_20_Text"><text:span text:style-name="T7">=&gt;</text:span></text:span><text:span text:style-name="Source_20_Text"><text:span text:style-name="T1"> ({</text:span></text:span></text:p>
      <text:p text:style-name="P6"><text:span text:style-name="Source_20_Text"><text:span text:style-name="T2"><text:s text:c="8"/></text:span></text:span><text:span text:style-name="Source_20_Text"><text:span text:style-name="T1">typ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configuration'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confidenc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0.9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descrip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`Problème de configuration: </text:span></text:span><text:span text:style-name="Source_20_Text"><text:span text:style-name="T1">${issue.description}</text:span></text:span><text:span text:style-name="Source_20_Text"><text:span text:style-name="T8">`</text:span></text:span><text:span text:style-name="Source_20_Text"><text:span text:style-name="T1">,</text:span></text:span></text:p>
      <text:p text:style-name="P6"><text:span text:style-name="Source_20_Text"><text:span text:style-name="T2"><text:s text:c="8"/></text:span></text:span><text:span text:style-name="Source_20_Text"><text:span text:style-name="T1">steps</text:span></text:span><text:span text:style-name="Source_20_Text"><text:span text:style-name="T7">:</text:span></text:span><text:span text:style-name="Source_20_Text"><text:span text:style-name="T1"> issue.fixSteps,</text:span></text:span></text:p>
      <text:p text:style-name="P6"><text:span text:style-name="Source_20_Text"><text:span text:style-name="T2"><text:s text:c="8"/></text:span></text:span><text:span text:style-name="Source_20_Text"><text:span text:style-name="T1">autoApplicable</text:span></text:span><text:span text:style-name="Source_20_Text"><text:span text:style-name="T7">:</text:span></text:span><text:span text:style-name="Source_20_Text"><text:span text:style-name="T1"> issue.canAutoFix</text:span></text:span></text:p>
      <text:p text:style-name="P6"><text:span text:style-name="Source_20_Text"><text:span text:style-name="T2"><text:s text:c="6"/></text:span></text:span><text:span text:style-name="Source_20_Text"><text:span text:style-name="T1">})))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suggestions.</text:span></text:span><text:span text:style-name="Source_20_Text"><text:span text:style-name="T7">sort</text:span></text:span><text:span text:style-name="Source_20_Text"><text:span text:style-name="T1">((a, b) </text:span></text:span><text:span text:style-name="Source_20_Text"><text:span text:style-name="T7">=&gt;</text:span></text:span><text:span text:style-name="Source_20_Text"><text:span text:style-name="T1"> b.confidence </text:span></text:span><text:span text:style-name="Source_20_Text"><text:span text:style-name="T7">-</text:span></text:span><text:span text:style-name="Source_20_Text"><text:span text:style-name="T1"> a.confidence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Debugger interactif en cas d'erreur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createDebugSession</text:span></text:span><text:span text:style-name="Source_20_Text"><text:span text:style-name="T1">(errorContext</text:span></text:span><text:span text:style-name="Source_20_Text"><text:span text:style-name="T7">:</text:span></text:span><text:span text:style-name="Source_20_Text"><text:span text:style-name="T1"> ErrorContext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DebugSession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sess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DebugSession</text:span></text:span><text:span text:style-name="Source_20_Text"><text:span text:style-name="T1">(errorContext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Reproduction automatique de l'erreur</text:span></text:span></text:p>
      <text:p text:style-name="P6"><text:span text:style-name="Source_20_Text"><text:span text:style-name="T2"><text:s text:c="4"/></text:span></text:span><text:span text:style-name="Source_20_Text"><text:span text:style-name="T1">session.reproduction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ttemptReproduction</text:span></text:span><text:span text:style-name="Source_20_Text"><text:span text:style-name="T1">(errorContext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État des variables au moment de l'erreur</text:span></text:span></text:p>
      <text:p text:style-name="P6"><text:span text:style-name="Source_20_Text"><text:span text:style-name="T2"><text:s text:c="4"/></text:span></text:span><text:span text:style-name="Source_20_Text"><text:span text:style-name="T1">session.variableState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aptureVariableState</text:span></text:span><text:span text:style-name="Source_20_Text"><text:span text:style-name="T1">(errorContext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Trace d'exécution simplifiée</text:span></text:span></text:p>
      <text:p text:style-name="P6"><text:span text:style-name="Source_20_Text"><text:span text:style-name="T2"><text:s text:c="4"/></text:span></text:span><text:span text:style-name="Source_20_Text"><text:span text:style-name="T1">session.executionTrace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ExecutionTrace</text:span></text:span><text:span text:style-name="Source_20_Text"><text:span text:style-name="T1">(errorContext);</text:span></text:span></text:p>
      <text:p text:style-name="P6"><text:soft-page-break/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Tests de résolution automatiques</text:span></text:span></text:p>
      <text:p text:style-name="P6"><text:span text:style-name="Source_20_Text"><text:span text:style-name="T2"><text:s text:c="4"/></text:span></text:span><text:span text:style-name="Source_20_Text"><text:span text:style-name="T1">session.resolutionTest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reateResolutionTests</text:span></text:span><text:span text:style-name="Source_20_Text"><text:span text:style-name="T1">(errorContext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session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Logger intelligent avec auto-classification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IntelligentLogger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classifier</text:span></text:span><text:span text:style-name="Source_20_Text"><text:span text:style-name="T7">:</text:span></text:span><text:span text:style-name="Source_20_Text"><text:span text:style-name="T1"> LogClassifier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aggregator</text:span></text:span><text:span text:style-name="Source_20_Text"><text:span text:style-name="T7">:</text:span></text:span><text:span text:style-name="Source_20_Text"><text:span text:style-name="T1"> LogAggregator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Logging avec classification automatique</text:span></text:span></text:p>
      <text:p text:style-name="P6"><text:span text:style-name="Source_20_Text"><text:span text:style-name="T2"><text:s text:c="2"/></text:span></text:span><text:span text:style-name="Source_20_Text"><text:span text:style-name="T7">log</text:span></text:span><text:span text:style-name="Source_20_Text"><text:span text:style-name="T1">(level</text:span></text:span><text:span text:style-name="Source_20_Text"><text:span text:style-name="T7">:</text:span></text:span><text:span text:style-name="Source_20_Text"><text:span text:style-name="T1"> LogLevel, messag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, context</text:span></text:span><text:span text:style-name="Source_20_Text"><text:span text:style-name="T7">?:</text:span></text:span><text:span text:style-name="Source_20_Text"><text:span text:style-name="T1"> </text:span></text:span><text:span text:style-name="Source_20_Text"><text:span text:style-name="T8">any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void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logEntry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timestamp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new</text:span></text:span><text:span text:style-name="Source_20_Text"><text:span text:style-name="T1"> </text:span></text:span><text:span text:style-name="Source_20_Text"><text:span text:style-name="T6">Date</text:span></text:span><text:span text:style-name="Source_20_Text"><text:span text:style-name="T1">().</text:span></text:span><text:span text:style-name="Source_20_Text"><text:span text:style-name="T7">toISOString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1">level,</text:span></text:span></text:p>
      <text:p text:style-name="P6"><text:span text:style-name="Source_20_Text"><text:span text:style-name="T2"><text:s text:c="6"/></text:span></text:span><text:span text:style-name="Source_20_Text"><text:span text:style-name="T1">message,</text:span></text:span></text:p>
      <text:p text:style-name="P6"><text:span text:style-name="Source_20_Text"><text:span text:style-name="T2"><text:s text:c="6"/></text:span></text:span><text:span text:style-name="Source_20_Text"><text:span text:style-name="T1">contex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sanitizeContext</text:span></text:span><text:span text:style-name="Source_20_Text"><text:span text:style-name="T1">(context),</text:span></text:span></text:p>
      <text:p text:style-name="P6"><text:span text:style-name="Source_20_Text"><text:span text:style-name="T2"><text:s text:c="6"/></text:span></text:span><text:span text:style-name="Source_20_Text"><text:span text:style-name="T1">classific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classifier.</text:span></text:span><text:span text:style-name="Source_20_Text"><text:span text:style-name="T7">classify</text:span></text:span><text:span text:style-name="Source_20_Text"><text:span text:style-name="T1">(message, context),</text:span></text:span></text:p>
      <text:p text:style-name="P6"><text:span text:style-name="Source_20_Text"><text:span text:style-name="T2"><text:s text:c="6"/></text:span></text:span><text:span text:style-name="Source_20_Text"><text:span text:style-name="T1">fingerprin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Fingerprint</text:span></text:span><text:span text:style-name="Source_20_Text"><text:span text:style-name="T1">(message, context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Stockage intelligent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storeLog</text:span></text:span><text:span text:style-name="Source_20_Text"><text:span text:style-name="T1">(logEntry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Agrégation pour patterns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aggregator.</text:span></text:span><text:span text:style-name="Source_20_Text"><text:span text:style-name="T7">add</text:span></text:span><text:span text:style-name="Source_20_Text"><text:span text:style-name="T1">(logEntry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Alertes automatiques</text:span></text:span></text:p>
      <text:p text:style-name="P6"><text:span text:style-name="Source_20_Text"><text:span text:style-name="T2"><text:s text:c="4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heckForAlerts</text:span></text:span><text:span text:style-name="Source_20_Text"><text:span text:style-name="T1">(logEntry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Détection automatique de patterns problématiques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7">checkForAlerts</text:span></text:span><text:span text:style-name="Source_20_Text"><text:span text:style-name="T1">(logEntry</text:span></text:span><text:span text:style-name="Source_20_Text"><text:span text:style-name="T7">:</text:span></text:span><text:span text:style-name="Source_20_Text"><text:span text:style-name="T1"> LogEntry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void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4">// Détection de pics d'erreurs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recentError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ggregator.</text:span></text:span><text:span text:style-name="Source_20_Text"><text:span text:style-name="T7">getRecentErrors</text:span></text:span><text:span text:style-name="Source_20_Text"><text:span text:style-name="T1">(</text:span></text:span><text:span text:style-name="Source_20_Text"><text:span text:style-name="T6">5</text:span></text:span><text:span text:style-name="Source_20_Text"><text:span text:style-name="T1"> </text:span></text:span><text:span text:style-name="Source_20_Text"><text:span text:style-name="T7">*</text:span></text:span><text:span text:style-name="Source_20_Text"><text:span text:style-name="T1"> </text:span></text:span><text:span text:style-name="Source_20_Text"><text:span text:style-name="T6">60</text:span></text:span><text:span text:style-name="Source_20_Text"><text:span text:style-name="T1"> </text:span></text:span><text:span text:style-name="Source_20_Text"><text:span text:style-name="T7">*</text:span></text:span><text:span text:style-name="Source_20_Text"><text:span text:style-name="T1"> </text:span></text:span><text:span text:style-name="Source_20_Text"><text:span text:style-name="T6">1000</text:span></text:span><text:span text:style-name="Source_20_Text"><text:span text:style-name="T1">); </text:span></text:span><text:span text:style-name="Source_20_Text"><text:span text:style-name="T4">// 5 min</text:span></text:span></text:p>
      <text:p text:style-name="P6"><text:span text:style-name="Source_20_Text"><text:span text:style-name="T2"><text:s text:c="4"/></text:span></text:span><text:span text:style-name="Source_20_Text"><text:span text:style-name="T5">if</text:span></text:span><text:span text:style-name="Source_20_Text"><text:span text:style-name="T1"> (recentErrors.length 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6">10</text:span></text:span><text:span text:style-name="Source_20_Text"><text:span text:style-name="T1">) {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alertingSystem.</text:span></text:span><text:span text:style-name="Source_20_Text"><text:span text:style-name="T7">triggerAlert</text:span></text:span><text:span text:style-name="Source_20_Text"><text:span text:style-name="T1">(</text:span></text:span><text:span text:style-name="Source_20_Text"><text:span text:style-name="T8">'error_spike'</text:span></text:span><text:span text:style-name="Source_20_Text"><text:span text:style-name="T1">, {</text:span></text:span></text:p>
      <text:p text:style-name="P6"><text:soft-page-break/><text:span text:style-name="Source_20_Text"><text:span text:style-name="T2"><text:s text:c="8"/></text:span></text:span><text:span text:style-name="Source_20_Text"><text:span text:style-name="T1">count</text:span></text:span><text:span text:style-name="Source_20_Text"><text:span text:style-name="T7">:</text:span></text:span><text:span text:style-name="Source_20_Text"><text:span text:style-name="T1"> recentErrors.length,</text:span></text:span></text:p>
      <text:p text:style-name="P6"><text:span text:style-name="Source_20_Text"><text:span text:style-name="T2"><text:s text:c="8"/></text:span></text:span><text:span text:style-name="Source_20_Text"><text:span text:style-name="T1">patter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ggregator.</text:span></text:span><text:span text:style-name="Source_20_Text"><text:span text:style-name="T7">detectPattern</text:span></text:span><text:span text:style-name="Source_20_Text"><text:span text:style-name="T1">(recentErrors)</text:span></text:span></text:p>
      <text:p text:style-name="P6"><text:span text:style-name="Source_20_Text"><text:span text:style-name="T2"><text:s text:c="6"/></text:span></text:span><text:span text:style-name="Source_20_Text"><text:span text:style-name="T1">})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Détection d'erreurs critiques</text:span></text:span></text:p>
      <text:p text:style-name="P6"><text:span text:style-name="Source_20_Text"><text:span text:style-name="T2"><text:s text:c="4"/></text:span></text:span><text:span text:style-name="Source_20_Text"><text:span text:style-name="T5">if</text:span></text:span><text:span text:style-name="Source_20_Text"><text:span text:style-name="T1"> (logEntry.level </text:span></text:span><text:span text:style-name="Source_20_Text"><text:span text:style-name="T7">===</text:span></text:span><text:span text:style-name="Source_20_Text"><text:span text:style-name="T1"> </text:span></text:span><text:span text:style-name="Source_20_Text"><text:span text:style-name="T8">'critical'</text:span></text:span><text:span text:style-name="Source_20_Text"><text:span text:style-name="T1"> </text:span></text:span><text:span text:style-name="Source_20_Text"><text:span text:style-name="T7">||</text:span></text:span><text:span text:style-name="Source_20_Text"><text:span text:style-name="T1"> logEntry.classification</text:span></text:span><text:span text:style-name="Source_20_Text"><text:span text:style-name="T7">?.</text:span></text:span><text:span text:style-name="Source_20_Text"><text:span text:style-name="T1">severity </text:span></text:span><text:span text:style-name="Source_20_Text"><text:span text:style-name="T7">===</text:span></text:span><text:span text:style-name="Source_20_Text"><text:span text:style-name="T1"> </text:span></text:span><text:span text:style-name="Source_20_Text"><text:span text:style-name="T8">'critical'</text:span></text:span><text:span text:style-name="Source_20_Text"><text:span text:style-name="T1">) {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alertingSystem.</text:span></text:span><text:span text:style-name="Source_20_Text"><text:span text:style-name="T7">triggerImmediateAlert</text:span></text:span><text:span text:style-name="Source_20_Text"><text:span text:style-name="T1">(</text:span></text:span><text:span text:style-name="Source_20_Text"><text:span text:style-name="T8">'critical_error'</text:span></text:span><text:span text:style-name="Source_20_Text"><text:span text:style-name="T1">, logEntry)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4">// Détection de dégradation de performance</text:span></text:span></text:p>
      <text:p text:style-name="P6"><text:span text:style-name="Source_20_Text"><text:span text:style-name="T2"><text:s text:c="4"/></text:span></text:span><text:span text:style-name="Source_20_Text"><text:span text:style-name="T5">if</text:span></text:span><text:span text:style-name="Source_20_Text"><text:span text:style-name="T1"> (logEntry.context</text:span></text:span><text:span text:style-name="Source_20_Text"><text:span text:style-name="T7">?.</text:span></text:span><text:span text:style-name="Source_20_Text"><text:span text:style-name="T1">duration </text:span></text:span><text:span text:style-name="Source_20_Text"><text:span text:style-name="T7">&amp;&amp;</text:span></text:span><text:span text:style-name="Source_20_Text"><text:span text:style-name="T1"> logEntry.context.duration </text:span></text:span><text:span text:style-name="Source_20_Text"><text:span text:style-name="T7">&gt;</text:span></text:span><text:span text:style-name="Source_20_Text"><text:span text:style-name="T1"> </text:span></text:span><text:span text:style-name="Source_20_Text"><text:span text:style-name="T6">5000</text:span></text:span><text:span text:style-name="Source_20_Text"><text:span text:style-name="T1">) {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alertingSystem.</text:span></text:span><text:span text:style-name="Source_20_Text"><text:span text:style-name="T7">triggerAlert</text:span></text:span><text:span text:style-name="Source_20_Text"><text:span text:style-name="T1">(</text:span></text:span><text:span text:style-name="Source_20_Text"><text:span text:style-name="T8">'performance_degradation'</text:span></text:span><text:span text:style-name="Source_20_Text"><text:span text:style-name="T1">, logEntry);</text:span></text:span></text:p>
      <text:p text:style-name="P6"><text:span text:style-name="Source_20_Text"><text:span text:style-name="T2"><text:s text:c="4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</text:span></text:span></text:p>
      <text:p text:style-name="Horizontal_20_Line"/>
      <text:h text:style-name="Heading_20_2" text:outline-level="2">? Métriques et Monitoring Intelligent</text:h>
      <text:h text:style-name="Heading_20_3" text:outline-level="3">Tableau de Bord Unifié</text:h>
      <text:p text:style-name="P3">typescript</text:p>
      <text:p text:style-name="P5"><text:span text:style-name="Source_20_Text"><text:span text:style-name="T3">// Dashboard intelligent avec métriques business et technique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UnifiedDashboard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metricsCollector</text:span></text:span><text:span text:style-name="Source_20_Text"><text:span text:style-name="T7">:</text:span></text:span><text:span text:style-name="Source_20_Text"><text:span text:style-name="T1"> MetricsCollector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businessAnalyzer</text:span></text:span><text:span text:style-name="Source_20_Text"><text:span text:style-name="T7">:</text:span></text:span><text:span text:style-name="Source_20_Text"><text:span text:style-name="T1"> BusinessMetricsAnalyzer;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technicalMonitor</text:span></text:span><text:span text:style-name="Source_20_Text"><text:span text:style-name="T7">:</text:span></text:span><text:span text:style-name="Source_20_Text"><text:span text:style-name="T1"> TechnicalMonitor;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Métriques en temps réel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tRealtimeMetrics</text:span></text:span><text:span text:style-name="Source_20_Text"><text:span text:style-name="T1">(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RealtimeDashboard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[business, technical, user, partner]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1">.</text:span></text:span><text:span text:style-name="Source_20_Text"><text:span text:style-name="T7">all</text:span></text:span><text:span text:style-name="Source_20_Text"><text:span text:style-name="T1">([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BusinessMetrics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TechnicalMetrics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UserMetrics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PartnerMetrics</text:span></text:span><text:span text:style-name="Source_20_Text"><text:span text:style-name="T1">()</text:span></text:span></text:p>
      <text:p text:style-name="P6"><text:span text:style-name="Source_20_Text"><text:span text:style-name="T2"><text:s text:c="4"/></text:span></text:span><text:span text:style-name="Source_20_Text"><text:span text:style-name="T1">]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1">business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4">// Métriques business critiques</text:span></text:span></text:p>
      <text:p text:style-name="P6"><text:span text:style-name="Source_20_Text"><text:span text:style-name="T2"><text:s text:c="8"/></text:span></text:span><text:span text:style-name="Source_20_Text"><text:span text:style-name="T1">designsGenerated</text:span></text:span><text:span text:style-name="Source_20_Text"><text:span text:style-name="T7">:</text:span></text:span><text:span text:style-name="Source_20_Text"><text:span text:style-name="T1"> business.designsGenerated,</text:span></text:span></text:p>
      <text:p text:style-name="P6"><text:span text:style-name="Source_20_Text"><text:span text:style-name="T2"><text:s text:c="8"/></text:span></text:span><text:span text:style-name="Source_20_Text"><text:span text:style-name="T1">conversionRate</text:span></text:span><text:span text:style-name="Source_20_Text"><text:span text:style-name="T7">:</text:span></text:span><text:span text:style-name="Source_20_Text"><text:span text:style-name="T1"> business.conversionRate,</text:span></text:span></text:p>
      <text:p text:style-name="P6"><text:span text:style-name="Source_20_Text"><text:span text:style-name="T2"><text:s text:c="8"/></text:span></text:span><text:span text:style-name="Source_20_Text"><text:span text:style-name="T1">averageSessionTime</text:span></text:span><text:span text:style-name="Source_20_Text"><text:span text:style-name="T7">:</text:span></text:span><text:span text:style-name="Source_20_Text"><text:span text:style-name="T1"> business.averageSessionTime,</text:span></text:span></text:p>
      <text:p text:style-name="P6"><text:span text:style-name="Source_20_Text"><text:span text:style-name="T2"><text:s text:c="8"/></text:span></text:span><text:span text:style-name="Source_20_Text"><text:span text:style-name="T1">revenuePerUser</text:span></text:span><text:span text:style-name="Source_20_Text"><text:span text:style-name="T7">:</text:span></text:span><text:span text:style-name="Source_20_Text"><text:span text:style-name="T1"> business.revenuePerUser,</text:span></text:span></text:p>
      <text:p text:style-name="P6"><text:span text:style-name="Source_20_Text"><text:span text:style-name="T2"><text:s text:c="8"/></text:span></text:span><text:span text:style-name="Source_20_Text"><text:span text:style-name="T1">customerSatisfaction</text:span></text:span><text:span text:style-name="Source_20_Text"><text:span text:style-name="T7">:</text:span></text:span><text:span text:style-name="Source_20_Text"><text:span text:style-name="T1"> business.customerSatisfaction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technical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4">// Métriques techniques</text:span></text:span></text:p>
      <text:p text:style-name="P6"><text:span text:style-name="Source_20_Text"><text:span text:style-name="T2"><text:s text:c="8"/></text:span></text:span><text:span text:style-name="Source_20_Text"><text:span text:style-name="T1">systemHealth</text:span></text:span><text:span text:style-name="Source_20_Text"><text:span text:style-name="T7">:</text:span></text:span><text:span text:style-name="Source_20_Text"><text:span text:style-name="T1"> technical.overallHealth,</text:span></text:span></text:p>
      <text:p text:style-name="P6"><text:span text:style-name="Source_20_Text"><text:span text:style-name="T2"><text:s text:c="8"/></text:span></text:span><text:span text:style-name="Source_20_Text"><text:span text:style-name="T1">apiLatency</text:span></text:span><text:span text:style-name="Source_20_Text"><text:span text:style-name="T7">:</text:span></text:span><text:span text:style-name="Source_20_Text"><text:span text:style-name="T1"> technical.averageLatency,</text:span></text:span></text:p>
      <text:p text:style-name="P6"><text:span text:style-name="Source_20_Text"><text:span text:style-name="T2"><text:s text:c="8"/></text:span></text:span><text:span text:style-name="Source_20_Text"><text:span text:style-name="T1">errorRate</text:span></text:span><text:span text:style-name="Source_20_Text"><text:span text:style-name="T7">:</text:span></text:span><text:span text:style-name="Source_20_Text"><text:span text:style-name="T1"> technical.errorRate,</text:span></text:span></text:p>
      <text:p text:style-name="P6"><text:span text:style-name="Source_20_Text"><text:span text:style-name="T2"><text:s text:c="8"/></text:span></text:span><text:span text:style-name="Source_20_Text"><text:span text:style-name="T1">uptime</text:span></text:span><text:span text:style-name="Source_20_Text"><text:span text:style-name="T7">:</text:span></text:span><text:span text:style-name="Source_20_Text"><text:span text:style-name="T1"> technical.uptime,</text:span></text:span></text:p>
      <text:p text:style-name="P6"><text:span text:style-name="Source_20_Text"><text:span text:style-name="T2"><text:s text:c="8"/></text:span></text:span><text:span text:style-name="Source_20_Text"><text:span text:style-name="T1">resourceUtilization</text:span></text:span><text:span text:style-name="Source_20_Text"><text:span text:style-name="T7">:</text:span></text:span><text:span text:style-name="Source_20_Text"><text:span text:style-name="T1"> technical.resourceUtilization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user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4">// Métriques utilisateur</text:span></text:span></text:p>
      <text:p text:style-name="P6"><text:span text:style-name="Source_20_Text"><text:span text:style-name="T2"><text:s text:c="8"/></text:span></text:span><text:span text:style-name="Source_20_Text"><text:span text:style-name="T1">activeUsers</text:span></text:span><text:span text:style-name="Source_20_Text"><text:span text:style-name="T7">:</text:span></text:span><text:span text:style-name="Source_20_Text"><text:span text:style-name="T1"> user.activeUsers,</text:span></text:span></text:p>
      <text:p text:style-name="P6"><text:span text:style-name="Source_20_Text"><text:span text:style-name="T2"><text:s text:c="8"/></text:span></text:span><text:span text:style-name="Source_20_Text"><text:span text:style-name="T1">newUsers</text:span></text:span><text:span text:style-name="Source_20_Text"><text:span text:style-name="T7">:</text:span></text:span><text:span text:style-name="Source_20_Text"><text:span text:style-name="T1"> user.newUsers,</text:span></text:span></text:p>
      <text:p text:style-name="P6"><text:span text:style-name="Source_20_Text"><text:span text:style-name="T2"><text:s text:c="8"/></text:span></text:span><text:span text:style-name="Source_20_Text"><text:span text:style-name="T1">retentionRate</text:span></text:span><text:span text:style-name="Source_20_Text"><text:span text:style-name="T7">:</text:span></text:span><text:span text:style-name="Source_20_Text"><text:span text:style-name="T1"> user.retentionRate,</text:span></text:span></text:p>
      <text:p text:style-name="P6"><text:span text:style-name="Source_20_Text"><text:span text:style-name="T2"><text:s text:c="8"/></text:span></text:span><text:span text:style-name="Source_20_Text"><text:span text:style-name="T1">featureAdoption</text:span></text:span><text:span text:style-name="Source_20_Text"><text:span text:style-name="T7">:</text:span></text:span><text:span text:style-name="Source_20_Text"><text:span text:style-name="T1"> user.featureAdoption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partner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8"/></text:span></text:span><text:span text:style-name="Source_20_Text"><text:span text:style-name="T4">// Métriques partenaires</text:span></text:span></text:p>
      <text:p text:style-name="P6"><text:span text:style-name="Source_20_Text"><text:span text:style-name="T2"><text:s text:c="8"/></text:span></text:span><text:span text:style-name="Source_20_Text"><text:span text:style-name="T1">activePartners</text:span></text:span><text:span text:style-name="Source_20_Text"><text:span text:style-name="T7">:</text:span></text:span><text:span text:style-name="Source_20_Text"><text:span text:style-name="T1"> partner.activePartners,</text:span></text:span></text:p>
      <text:p text:style-name="P6"><text:span text:style-name="Source_20_Text"><text:span text:style-name="T2"><text:s text:c="8"/></text:span></text:span><text:span text:style-name="Source_20_Text"><text:span text:style-name="T1">apiUsage</text:span></text:span><text:span text:style-name="Source_20_Text"><text:span text:style-name="T7">:</text:span></text:span><text:span text:style-name="Source_20_Text"><text:span text:style-name="T1"> partner.apiUsage,</text:span></text:span></text:p>
      <text:p text:style-name="P6"><text:span text:style-name="Source_20_Text"><text:span text:style-name="T2"><text:s text:c="8"/></text:span></text:span><text:span text:style-name="Source_20_Text"><text:span text:style-name="T1">catalogHealth</text:span></text:span><text:span text:style-name="Source_20_Text"><text:span text:style-name="T7">:</text:span></text:span><text:span text:style-name="Source_20_Text"><text:span text:style-name="T1"> partner.catalogHealth,</text:span></text:span></text:p>
      <text:p text:style-name="P6"><text:span text:style-name="Source_20_Text"><text:span text:style-name="T2"><text:s text:c="8"/></text:span></text:span><text:span text:style-name="Source_20_Text"><text:span text:style-name="T1">integrationSuccess</text:span></text:span><text:span text:style-name="Source_20_Text"><text:span text:style-name="T7">:</text:span></text:span><text:span text:style-name="Source_20_Text"><text:span text:style-name="T1"> partner.integrationSuccess</text:span></text:span></text:p>
      <text:p text:style-name="P6"><text:span text:style-name="Source_20_Text"><text:span text:style-name="T2"><text:s text:c="6"/></text:span></text:span><text:span text:style-name="Source_20_Text"><text:span text:style-name="T1">},</text:span></text:span></text:p>
      <text:p text:style-name="P6"><text:span text:style-name="Source_20_Text"><text:span text:style-name="T2"><text:s text:c="6"/></text:span></text:span><text:span text:style-name="Source_20_Text"><text:span text:style-name="T1">alert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ActiveAlerts</text:span></text:span><text:span text:style-name="Source_20_Text"><text:span text:style-name="T1">(),</text:span></text:span></text:p>
      <text:p text:style-name="P6"><text:span text:style-name="Source_20_Text"><text:span text:style-name="T2"><text:s text:c="6"/></text:span></text:span><text:span text:style-name="Source_20_Text"><text:span text:style-name="T1">predic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Predictions</text:span></text:span><text:span text:style-name="Source_20_Text"><text:span text:style-name="T1">(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Alertes intelligentes avec suggestions d'action</text:span></text:span></text:p>
      <text:p text:style-name="P6"><text:span text:style-name="Source_20_Text"><text:span text:style-name="T2"><text:s text:c="2"/></text:span></text:span><text:span text:style-name="Source_20_Text"><text:span text:style-name="T5">private</text:span></text:span><text:span text:style-name="Source_20_Text"><text:span text:style-name="T1"> 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generateSmartAlerts</text:span></text:span><text:span text:style-name="Source_20_Text"><text:span text:style-name="T1">(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SmartAlert[]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alert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alertingSystem.</text:span></text:span><text:span text:style-name="Source_20_Text"><text:span text:style-name="T7">getActiveAlerts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alerts.</text:span></text:span><text:span text:style-name="Source_20_Text"><text:span text:style-name="T7">map</text:span></text:span><text:span text:style-name="Source_20_Text"><text:span text:style-name="T1">(alert </text:span></text:span><text:span text:style-name="Source_20_Text"><text:span text:style-name="T7">=&gt;</text:span></text:span><text:span text:style-name="Source_20_Text"><text:span text:style-name="T1"> ({</text:span></text:span></text:p>
      <text:p text:style-name="P6"><text:soft-page-break/><text:span text:style-name="Source_20_Text"><text:span text:style-name="T2"><text:s text:c="6"/></text:span></text:span><text:span text:style-name="Source_20_Text"><text:span text:style-name="T7">...</text:span></text:span><text:span text:style-name="Source_20_Text"><text:span text:style-name="T1">alert,</text:span></text:span></text:p>
      <text:p text:style-name="P6"><text:span text:style-name="Source_20_Text"><text:span text:style-name="T2"><text:s text:c="6"/></text:span></text:span><text:span text:style-name="Source_20_Text"><text:span text:style-name="T4">// Ajout d'intelligence</text:span></text:span></text:p>
      <text:p text:style-name="P6"><text:span text:style-name="Source_20_Text"><text:span text:style-name="T2"><text:s text:c="6"/></text:span></text:span><text:span text:style-name="Source_20_Text"><text:span text:style-name="T1">impac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alculateBusinessImpact</text:span></text:span><text:span text:style-name="Source_20_Text"><text:span text:style-name="T1">(alert),</text:span></text:span></text:p>
      <text:p text:style-name="P6"><text:span text:style-name="Source_20_Text"><text:span text:style-name="T2"><text:s text:c="6"/></text:span></text:span><text:span text:style-name="Source_20_Text"><text:span text:style-name="T1">suggestedAc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ActionSuggestions</text:span></text:span><text:span text:style-name="Source_20_Text"><text:span text:style-name="T1">(alert),</text:span></text:span></text:p>
      <text:p text:style-name="P6"><text:span text:style-name="Source_20_Text"><text:span text:style-name="T2"><text:s text:c="6"/></text:span></text:span><text:span text:style-name="Source_20_Text"><text:span text:style-name="T1">autom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AutomationOptions</text:span></text:span><text:span text:style-name="Source_20_Text"><text:span text:style-name="T1">(alert),</text:span></text:span></text:p>
      <text:p text:style-name="P6"><text:span text:style-name="Source_20_Text"><text:span text:style-name="T2"><text:s text:c="6"/></text:span></text:span><text:span text:style-name="Source_20_Text"><text:span text:style-name="T1">escal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determineEscalationPath</text:span></text:span><text:span text:style-name="Source_20_Text"><text:span text:style-name="T1">(alert)</text:span></text:span></text:p>
      <text:p text:style-name="P6"><text:span text:style-name="Source_20_Text"><text:span text:style-name="T2"><text:s text:c="4"/></text:span></text:span><text:span text:style-name="Source_20_Text"><text:span text:style-name="T1">})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</text:span></text:span></text:p>
      <text:p text:style-name="P6"/>
      <text:p text:style-name="P7"><text:span text:style-name="Source_20_Text"><text:span text:style-name="T3">// Prédictions basées sur les données historiques</text:span></text:span></text:p>
      <text:p text:style-name="P6"><text:span text:style-name="Source_20_Text"><text:span text:style-name="T5">class</text:span></text:span><text:span text:style-name="Source_20_Text"><text:span text:style-name="T1"> </text:span></text:span><text:span text:style-name="Source_20_Text"><text:span text:style-name="T6">PredictiveAnalytics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4">// Prédiction de charge et scaling automatique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predictLoad</text:span></text:span><text:span text:style-name="Source_20_Text"><text:span text:style-name="T1">(timefram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string</text:span></text:span><text:span text:style-name="Source_20_Text"><text:span text:style-name="T1">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LoadPrediction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historicalData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HistoricalLoad</text:span></text:span><text:span text:style-name="Source_20_Text"><text:span text:style-name="T1">(timeframe);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seasonalPattern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detectSeasonalPatterns</text:span></text:span><text:span text:style-name="Source_20_Text"><text:span text:style-name="T1">(historicalData);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trendAnalysi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nalyzeTrends</text:span></text:span><text:span text:style-name="Source_20_Text"><text:span text:style-name="T1">(historicalData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{</text:span></text:span></text:p>
      <text:p text:style-name="P6"><text:span text:style-name="Source_20_Text"><text:span text:style-name="T2"><text:s text:c="6"/></text:span></text:span><text:span text:style-name="Source_20_Text"><text:span text:style-name="T1">predictedPeakTim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predictPeakTimes</text:span></text:span><text:span text:style-name="Source_20_Text"><text:span text:style-name="T1">(seasonalPatterns),</text:span></text:span></text:p>
      <text:p text:style-name="P6"><text:span text:style-name="Source_20_Text"><text:span text:style-name="T2"><text:s text:c="6"/></text:span></text:span><text:span text:style-name="Source_20_Text"><text:span text:style-name="T1">recommendedScaling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ScalingRecommendations</text:span></text:span><text:span text:style-name="Source_20_Text"><text:span text:style-name="T1">(trendAnalysis),</text:span></text:span></text:p>
      <text:p text:style-name="P6"><text:span text:style-name="Source_20_Text"><text:span text:style-name="T2"><text:s text:c="6"/></text:span></text:span><text:span text:style-name="Source_20_Text"><text:span text:style-name="T1">confidenceLevel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calculatePredictionConfidence</text:span></text:span><text:span text:style-name="Source_20_Text"><text:span text:style-name="T1">(historicalData),</text:span></text:span></text:p>
      <text:p text:style-name="P6"><text:span text:style-name="Source_20_Text"><text:span text:style-name="T2"><text:s text:c="6"/></text:span></text:span><text:span text:style-name="Source_20_Text"><text:span text:style-name="T1">resourceRequirement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predictResourceNeeds</text:span></text:span><text:span text:style-name="Source_20_Text"><text:span text:style-name="T1">(trendAnalysis)</text:span></text:span></text:p>
      <text:p text:style-name="P6"><text:span text:style-name="Source_20_Text"><text:span text:style-name="T2"><text:s text:c="4"/></text:span></text:span><text:span text:style-name="Source_20_Text"><text:span text:style-name="T1">}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Prédiction de problèmes avant qu'ils surviennent</text:span></text:span></text:p>
      <text:p text:style-name="P6"><text:span text:style-name="Source_20_Text"><text:span text:style-name="T2"><text:s text:c="2"/></text:span></text:span><text:span text:style-name="Source_20_Text"><text:span text:style-name="T5">async</text:span></text:span><text:span text:style-name="Source_20_Text"><text:span text:style-name="T1"> </text:span></text:span><text:span text:style-name="Source_20_Text"><text:span text:style-name="T7">predictIssues</text:span></text:span><text:span text:style-name="Source_20_Text"><text:span text:style-name="T1">()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6">Promise</text:span></text:span><text:span text:style-name="Source_20_Text"><text:span text:style-name="T7">&lt;</text:span></text:span><text:span text:style-name="Source_20_Text"><text:span text:style-name="T1">IssuePrediction[]</text:span></text:span><text:span text:style-name="Source_20_Text"><text:span text:style-name="T7">&gt;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pattern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analyzeHistoricalIssues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text:span text:style-name="Source_20_Text"><text:span text:style-name="T5">const</text:span></text:span><text:span text:style-name="Source_20_Text"><text:span text:style-name="T1"> currentMetrics </text:span></text:span><text:span text:style-name="Source_20_Text"><text:span text:style-name="T7">=</text:span></text:span><text:span text:style-name="Source_20_Text"><text:span text:style-name="T1"> </text:span></text:span><text:span text:style-name="Source_20_Text"><text:span text:style-name="T5">await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CurrentSystemMetrics</text:span></text:span><text:span text:style-name="Source_20_Text"><text:span text:style-name="T1">();</text:span></text:span></text:p>
      <text:p text:style-name="P6"><text:span text:style-name="Source_20_Text"><text:span text:style-name="T2"><text:s text:c="4"/></text:span></text:span></text:p>
      <text:p text:style-name="P6"><text:span text:style-name="Source_20_Text"><text:span text:style-name="T2"><text:s text:c="4"/></text:span></text:span><text:span text:style-name="Source_20_Text"><text:span text:style-name="T5">return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mlModel.</text:span></text:span><text:span text:style-name="Source_20_Text"><text:span text:style-name="T7">predict</text:span></text:span><text:span text:style-name="Source_20_Text"><text:span text:style-name="T1">(patterns, currentMetrics).</text:span></text:span><text:span text:style-name="Source_20_Text"><text:span text:style-name="T7">map</text:span></text:span><text:span text:style-name="Source_20_Text"><text:span text:style-name="T1">(prediction </text:span></text:span><text:span text:style-name="Source_20_Text"><text:span text:style-name="T7">=&gt;</text:span></text:span><text:span text:style-name="Source_20_Text"><text:span text:style-name="T1"> ({</text:span></text:span></text:p>
      <text:p text:style-name="P6"><text:span text:style-name="Source_20_Text"><text:span text:style-name="T2"><text:s text:c="6"/></text:span></text:span><text:span text:style-name="Source_20_Text"><text:span text:style-name="T1">issueType</text:span></text:span><text:span text:style-name="Source_20_Text"><text:span text:style-name="T7">:</text:span></text:span><text:span text:style-name="Source_20_Text"><text:span text:style-name="T1"> prediction.type,</text:span></text:span></text:p>
      <text:p text:style-name="P6"><text:span text:style-name="Source_20_Text"><text:span text:style-name="T2"><text:s text:c="6"/></text:span></text:span><text:span text:style-name="Source_20_Text"><text:span text:style-name="T1">probability</text:span></text:span><text:span text:style-name="Source_20_Text"><text:span text:style-name="T7">:</text:span></text:span><text:span text:style-name="Source_20_Text"><text:span text:style-name="T1"> prediction.probability,</text:span></text:span></text:p>
      <text:p text:style-name="P6"><text:span text:style-name="Source_20_Text"><text:span text:style-name="T2"><text:s text:c="6"/></text:span></text:span><text:span text:style-name="Source_20_Text"><text:span text:style-name="T1">estimatedTimeToOccurrence</text:span></text:span><text:span text:style-name="Source_20_Text"><text:span text:style-name="T7">:</text:span></text:span><text:span text:style-name="Source_20_Text"><text:span text:style-name="T1"> prediction.timeframe,</text:span></text:span></text:p>
      <text:p text:style-name="P6"><text:span text:style-name="Source_20_Text"><text:span text:style-name="T2"><text:s text:c="6"/></text:span></text:span><text:span text:style-name="Source_20_Text"><text:span text:style-name="T1">preventiveAc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neratePreventiveActions</text:span></text:span><text:span text:style-name="Source_20_Text"><text:span text:style-name="T1">(prediction),</text:span></text:span></text:p>
      <text:p text:style-name="P6"><text:span text:style-name="Source_20_Text"><text:span text:style-name="T2"><text:s text:c="6"/></text:span></text:span><text:span text:style-name="Source_20_Text"><text:span text:style-name="T1">automaticPreven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5">this</text:span></text:span><text:span text:style-name="Source_20_Text"><text:span text:style-name="T1">.</text:span></text:span><text:span text:style-name="Source_20_Text"><text:span text:style-name="T7">getAutomaticPreventionOptions</text:span></text:span><text:span text:style-name="Source_20_Text"><text:span text:style-name="T1">(prediction)</text:span></text:span></text:p>
      <text:p text:style-name="P6"><text:span text:style-name="Source_20_Text"><text:span text:style-name="T2"><text:s text:c="4"/></text:span></text:span><text:span text:style-name="Source_20_Text"><text:span text:style-name="T1">}));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</text:span></text:span></text:p>
      <text:p text:style-name="Horizontal_20_Line"><text:soft-page-break/></text:p>
      <text:h text:style-name="Heading_20_2" text:outline-level="2">? Déploiement et DevOps Automatisés</text:h>
      <text:h text:style-name="Heading_20_3" text:outline-level="3">Pipeline CI/CD Intelligent</text:h>
      <text:p text:style-name="P3">typescript</text:p>
      <text:p text:style-name="P5"><text:span text:style-name="Source_20_Text"><text:span text:style-name="T3">// Pipeline de déploiement avec validation automatique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CI_CD_PIPELINE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4">// Tests automatiques multi-niveaux</text:span></text:span></text:p>
      <text:p text:style-name="P6"><text:span text:style-name="Source_20_Text"><text:span text:style-name="T2"><text:s text:c="2"/></text:span></text:span><text:span text:style-name="Source_20_Text"><text:span text:style-name="T1">testing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unit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Jest avec coverage &gt; 90%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integr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ests API complet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e2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Cypress avec scénarios busines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7">performance:</text:span></text:span><text:span text:style-name="Source_20_Text"><text:span text:style-name="T1"> </text:span></text:span><text:span text:style-name="Source_20_Text"><text:span text:style-name="T8">'Load testing automatiqu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securit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Scan sécurité automatiqu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accessibilit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ests a11y automatiques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Déploiement progressif</text:span></text:span></text:p>
      <text:p text:style-name="P6"><text:span text:style-name="Source_20_Text"><text:span text:style-name="T2"><text:s text:c="2"/></text:span></text:span><text:span text:style-name="Source_20_Text"><text:span text:style-name="T1">deployment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staging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Déploiement automatique sur staging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canar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Déploiement progressif 5% -&gt; 25% -&gt; 100%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rollback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Rollback automatique si métriques dégradé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monitoring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onitoring renforcé pendant 24h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4">// Validation post-déploiement</text:span></text:span></text:p>
      <text:p text:style-name="P6"><text:span text:style-name="Source_20_Text"><text:span text:style-name="T2"><text:s text:c="2"/></text:span></text:span><text:span text:style-name="Source_20_Text"><text:span text:style-name="T1">validation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healthCheck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Vérification santé servic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smokeTest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ests critiques automatiqu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metricsValidation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Validation métriques busines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userAcceptance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ests utilisateurs automatisés'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6"><text:span text:style-name="Source_20_Text"><text:span text:style-name="T1">};</text:span></text:span></text:p>
      <text:p text:style-name="P6"/>
      <text:p text:style-name="P7"><text:span text:style-name="Source_20_Text"><text:span text:style-name="T3">// Configuration Infrastructure as Code</text:span></text:span></text:p>
      <text:p text:style-name="P6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6">INFRASTRUCTURE_CONFIG</text:span></text:span><text:span text:style-name="Source_20_Text"><text:span text:style-name="T1"> </text:span></text:span><text:span text:style-name="Source_20_Text"><text:span text:style-name="T7">=</text:span></text:span><text:span text:style-name="Source_20_Text"><text:span text:style-name="T1"> {</text:span></text:span></text:p>
      <text:p text:style-name="P6"><text:span text:style-name="Source_20_Text"><text:span text:style-name="T2"><text:s text:c="2"/></text:span></text:span><text:span text:style-name="Source_20_Text"><text:span text:style-name="T1">kubernetes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autoscaling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Scaling automatique basé sur métriques'</text:span></text:span><text:span text:style-name="Source_20_Text"><text:span text:style-name="T1">,</text:span></text:span></text:p>
      <text:p text:style-name="P6"><text:soft-page-break/><text:span text:style-name="Source_20_Text"><text:span text:style-name="T2"><text:s text:c="4"/></text:span></text:span><text:span text:style-name="Source_20_Text"><text:span text:style-name="T1">resourceLimit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Limites intelligentes par service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healthProb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Probes de santé configuré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secret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Gestion sécurisée des secrets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1">monitoring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prometheu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Métriques techniqu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grafana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Dashboards busines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alertmanager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Alertes intelligente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jaeger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racing distribué'</text:span></text:span></text:p>
      <text:p text:style-name="P6"><text:span text:style-name="Source_20_Text"><text:span text:style-name="T2"><text:s text:c="2"/></text:span></text:span><text:span text:style-name="Source_20_Text"><text:span text:style-name="T1">},</text:span></text:span></text:p>
      <text:p text:style-name="P6"><text:span text:style-name="Source_20_Text"><text:span text:style-name="T2"><text:s text:c="2"/></text:span></text:span></text:p>
      <text:p text:style-name="P6"><text:span text:style-name="Source_20_Text"><text:span text:style-name="T2"><text:s text:c="2"/></text:span></text:span><text:span text:style-name="Source_20_Text"><text:span text:style-name="T1">backup</text:span></text:span><text:span text:style-name="Source_20_Text"><text:span text:style-name="T7">:</text:span></text:span><text:span text:style-name="Source_20_Text"><text:span text:style-name="T1"> {</text:span></text:span></text:p>
      <text:p text:style-name="P6"><text:span text:style-name="Source_20_Text"><text:span text:style-name="T2"><text:s text:c="4"/></text:span></text:span><text:span text:style-name="Source_20_Text"><text:span text:style-name="T1">database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Backup automatique toutes les 6h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configurations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Versioning des configurations'</text:span></text:span><text:span text:style-name="Source_20_Text"><text:span text:style-name="T1">,</text:span></text:span></text:p>
      <text:p text:style-name="P6"><text:span text:style-name="Source_20_Text"><text:span text:style-name="T2"><text:s text:c="4"/></text:span></text:span><text:span text:style-name="Source_20_Text"><text:span text:style-name="T1">recovery</text:span></text:span><text:span text:style-name="Source_20_Text"><text:span text:style-name="T7">:</text:span></text:span><text:span text:style-name="Source_20_Text"><text:span text:style-name="T1"> </text:span></text:span><text:span text:style-name="Source_20_Text"><text:span text:style-name="T8">'Tests de recovery automatiques'</text:span></text:span></text:p>
      <text:p text:style-name="P6"><text:span text:style-name="Source_20_Text"><text:span text:style-name="T2"><text:s text:c="2"/></text:span></text:span><text:span text:style-name="Source_20_Text"><text:span text:style-name="T1">}</text:span></text:span></text:p>
      <text:p text:style-name="P4"><text:span text:style-name="Source_20_Text"><text:span text:style-name="T1">};</text:span></text:span></text:p>
      <text:p text:style-name="Horizontal_20_Line"/>
      <text:p text:style-name="Text_20_body">Cette version pragmatique conserve toute la puissance des standards originaux tout en :</text:p>
      <text:p text:style-name="Text_20_body">✅ <text:span text:style-name="Strong_20_Emphasis">Réduisant les risques de sur-ingénierie</text:span> avec des fallbacks systématiques ✅ <text:span text:style-name="Strong_20_Emphasis">Facilitant la maintenance</text:span> avec auto-diagnostic et corrections automatiques<text:line-break/>✅ <text:span text:style-name="Strong_20_Emphasis">Rendant le debugging simple</text:span> avec contexte riche et suggestions intelligentes ✅ <text:span text:style-name="Strong_20_Emphasis">Offrant l'interopérabilité B2B</text:span> avec APIs standardisées OpenAPI 3.1 ✅ <text:span text:style-name="Strong_20_Emphasis">Permettant la customisation no-code</text:span> pour partenaires ✅ <text:span text:style-name="Strong_20_Emphasis">Assurant la validation métier</text:span> avec preuves automatiques</text:p>
      <text:p text:style-name="Text_20_body">La roadmap progressive permet de délivrer de la valeur rapidement tout en construisant vers l'innovation, avec une approche validée et mesurée à chaque étap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Code" svg:font-family="'Fira Code', 'Fira Mono', Menlo, Consolas, 'DejaVu Sa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DELBOSC</meta:initial-creator>
    <meta:creation-date>2025-05-22T20:44:01.15</meta:creation-date>
    <meta:document-statistic meta:table-count="0" meta:image-count="0" meta:object-count="0" meta:page-count="34" meta:paragraph-count="1272" meta:word-count="3581" meta:character-count="40378"/>
    <dc:date>2025-05-22T21:01:13.17</dc:date>
    <dc:creator>LAURENT DELBOSC</dc:creator>
    <meta:editing-duration>PT17M13S</meta:editing-duration>
    <meta:editing-cycles>1</meta:editing-cycles>
    <meta:generator>OpenOffice/4.1.15$Win32 OpenOffice.org_project/4115m2$Build-9813</meta:generator>
  </office:meta>
</office:document-meta>
</file>